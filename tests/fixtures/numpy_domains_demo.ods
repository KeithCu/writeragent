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of="urn:oasis:names:tc:opendocument:xmlns:of:1.2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of="urn:oasis:names:tc:opendocument:xmlns:of:1.2" xmlns:manifest="urn:oasis:names:tc:opendocument:xmlns:manifest:1.0" office:version="1.2">
  <office:automatic-styles/>
  <office:body>
    <office:spreadsheet>
      <table:table table:name="readme">
        <table:table-row>
          <table:table-cell office:value-type="string">
            <text:p>NumPy Domains Demo Workbook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Open this .ods file in LibreOffice Calc (native format preserves =PYTHON()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TUP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1. Settings → Python — set scripting.python_venv_path to your venv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. Install packages (Settings → Python Test shows groups):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   Analysis: uv pip install numpy pandas scipy scikit-learn statsmodels ydata-profiling pandas-montecarl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   Viz: uv pip install matplotlib seabor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   Math: uv pip install symp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   Quant: uv pip install yfinance pandas-ta quantstats pyportfolioop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   Optimize: scipy (usually with analysis stack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   Units: uv pip install pi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3. Deploy / restart WriterAgent so =PYTHON() and Run Python Script are registered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HEET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• analysis, viz, math, quant, optimize, units — one block per helper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• goal_seek_solver — native Calc Goal Seek / Solver (chat/MCP only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OW TO TES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• scalar / formatted_cell: Ctrl+Shift+F9 — compare python_formula column to expected_scalar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• visual: Run Python Script → Viz Helpers — chart image should appear on shee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• grid_egress / math: Run Python Script — multi-cell report or LO Math objec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• chat_prompt: paste into WriterAgent chat or MCP (where provided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• quant fetch_historical_data: requires interne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GENERAT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ython scripts/generate_numpy_domains_demo_spreadsheet.p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e tests/fixtures/numpy_domains_demo.README.md and docs/numpy-domains.m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nalysis">
        <table:table-row>
          <table:table-cell office:value-type="string">
            <text:p>test_id</text:p>
          </table:table-cell>
          <table:table-cell office:value-type="string">
            <text:p>domain</text:p>
          </table:table-cell>
          <table:table-cell office:value-type="string">
            <text:p>helper</text:p>
          </table:table-cell>
          <table:table-cell office:value-type="string">
            <text:p>description</text:p>
          </table:table-cell>
          <table:table-cell office:value-type="string">
            <text:p>col_1</text:p>
          </table:table-cell>
          <table:table-cell office:value-type="string">
            <text:p>col_2</text:p>
          </table:table-cell>
          <table:table-cell office:value-type="string">
            <text:p>col_3</text:p>
          </table:table-cell>
          <table:table-cell office:value-type="string">
            <text:p>col_4</text:p>
          </table:table-cell>
          <table:table-cell office:value-type="string">
            <text:p>col_5</text:p>
          </table:table-cell>
          <table:table-cell office:value-type="string">
            <text:p>col_6</text:p>
          </table:table-cell>
          <table:table-cell office:value-type="string">
            <text:p>col_7</text:p>
          </table:table-cell>
          <table:table-cell office:value-type="string">
            <text:p>col_8</text:p>
          </table:table-cell>
          <table:table-cell office:value-type="string">
            <text:p>col_9</text:p>
          </table:table-cell>
          <table:table-cell office:value-type="string">
            <text:p>params</text:p>
          </table:table-cell>
          <table:table-cell office:value-type="string">
            <text:p>expected_scalar</text:p>
          </table:table-cell>
          <table:table-cell office:value-type="string">
            <text:p>python_formula</text:p>
          </table:table-cell>
          <table:table-cell office:value-type="string">
            <text:p>script_hint</text:p>
          </table:table-cell>
          <table:table-cell office:value-type="string">
            <text:p>chat_prompt</text:p>
          </table:table-cell>
          <table:table-cell office:value-type="string">
            <text:p>notes</text:p>
          </table:table-cell>
        </table:table-row>
        <table:table-row>
          <table:table-cell office:value-type="string" table:number-columns-spanned="19">
            <text:p>[analysis]</text:p>
          </table:table-cell>
        </table:table-row>
        <table:table-row>
          <table:table-cell office:value-type="string">
            <text:p>describe_data</text:p>
          </table:table-cell>
          <table:table-cell office:value-type="string">
            <text:p>analysis</text:p>
          </table:table-cell>
          <table:table-cell office:value-type="string">
            <text:p>describe_data</text:p>
          </table:table-cell>
          <table:table-cell office:value-type="string">
            <text:p>Extended EDA + column quality (ydata-profiling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}</text:p>
          </table:table-cell>
          <table:table-cell office:value-type="string">
            <text:p>4</text:p>
          </table:table-cell>
          <table:table-cell office:value-type="formula" table:formula="of:=PYTHON(&quot;from writeragent.scripting.analysis import run_analysis; run_analysis({&quot;&quot;helper&quot;&quot;:&quot;&quot;describe_data&quot;&quot;,&quot;&quot;params&quot;&quot;:{}}, data, {})[&quot;&quot;metrics&quot;&quot;][&quot;&quot;row_count&quot;&quot;]&quot;;E4:G8)"/>
          <table:table-cell office:value-type="string">
            <text:p>Analysis Helpers → [Analysis] describe_data</text:p>
          </table:table-cell>
          <table:table-cell office:value-type="string">
            <text:p>analyze_data helper=describe_data data_range=analysis.E4:G8</text:p>
          </table:table-cell>
          <table:table-cell office:value-type="string">
            <text:p>requires: ydata-profiling; check_mode: scalar</text:p>
          </table:table-cell>
        </table:table-row>
        <table:table-row>
          <table:table-cell office:value-type="string">
            <text:p>row_1</text:p>
          </table:table-cell>
          <table:table-cell/>
          <table:table-cell/>
          <table:table-cell/>
          <table:table-cell office:value-type="string">
            <text:p>Region</text:p>
          </table:table-cell>
          <table:table-cell office:value-type="string">
            <text:p>Sales</text:p>
          </table:table-cell>
          <table:table-cell office:value-type="string">
            <text:p>Unit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</text:p>
          </table:table-cell>
          <table:table-cell/>
          <table:table-cell/>
          <table:table-cell/>
          <table:table-cell office:value-type="string">
            <text:p>North</text:p>
          </table:table-cell>
          <table:table-cell office:value-type="string">
            <text:p>$1,200.50</text:p>
          </table:table-cell>
          <table:table-cell office:value-type="float" office:value="1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</text:p>
          </table:table-cell>
          <table:table-cell/>
          <table:table-cell/>
          <table:table-cell/>
          <table:table-cell office:value-type="string">
            <text:p>South</text:p>
          </table:table-cell>
          <table:table-cell office:value-type="string">
            <text:p>800</text:p>
          </table:table-cell>
          <table:table-cell office:value-type="float" office:value="8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4</text:p>
          </table:table-cell>
          <table:table-cell/>
          <table:table-cell/>
          <table:table-cell/>
          <table:table-cell office:value-type="string">
            <text:p>North</text:p>
          </table:table-cell>
          <table:table-cell office:value-type="string">
            <text:p>$1,500.00</text:p>
          </table:table-cell>
          <table:table-cell office:value-type="float" office:value="12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5</text:p>
          </table:table-cell>
          <table:table-cell/>
          <table:table-cell/>
          <table:table-cell/>
          <table:table-cell office:value-type="string">
            <text:p>East</text:p>
          </table:table-cell>
          <table:table-cell/>
          <table:table-cell office:value-type="float" office:value="5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pi_summary</text:p>
          </table:table-cell>
          <table:table-cell office:value-type="string">
            <text:p>analysis</text:p>
          </table:table-cell>
          <table:table-cell office:value-type="string">
            <text:p>kpi_summary</text:p>
          </table:table-cell>
          <table:table-cell office:value-type="string">
            <text:p>Aggregate mean/min/max/sum for metric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metrics":["Sales","Units"]}</text:p>
          </table:table-cell>
          <table:table-cell office:value-type="string">
            <text:p>ok</text:p>
          </table:table-cell>
          <table:table-cell office:value-type="formula" table:formula="of:=PYTHON(&quot;from writeragent.scripting.analysis import run_analysis; run_analysis({&quot;&quot;helper&quot;&quot;:&quot;&quot;kpi_summary&quot;&quot;,&quot;&quot;params&quot;&quot;:{&quot;&quot;metrics&quot;&quot;:[&quot;&quot;Sales&quot;&quot;,&quot;&quot;Units&quot;&quot;]}}, data, {})[&quot;&quot;status&quot;&quot;]&quot;;E11:G15)"/>
          <table:table-cell office:value-type="string">
            <text:p>Analysis Helpers → [Analysis] kpi_summary</text:p>
          </table:table-cell>
          <table:table-cell office:value-type="string">
            <text:p>analyze_data helper=kpi_summary data_range=analysis.E11:G15 params={"metrics":["Sales","Units"]}</text:p>
          </table:table-cell>
          <table:table-cell office:value-type="string">
            <text:p>check_mode: scalar</text:p>
          </table:table-cell>
        </table:table-row>
        <table:table-row>
          <table:table-cell office:value-type="string">
            <text:p>row_1</text:p>
          </table:table-cell>
          <table:table-cell/>
          <table:table-cell/>
          <table:table-cell/>
          <table:table-cell office:value-type="string">
            <text:p>Region</text:p>
          </table:table-cell>
          <table:table-cell office:value-type="string">
            <text:p>Sales</text:p>
          </table:table-cell>
          <table:table-cell office:value-type="string">
            <text:p>Unit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</text:p>
          </table:table-cell>
          <table:table-cell/>
          <table:table-cell/>
          <table:table-cell/>
          <table:table-cell office:value-type="string">
            <text:p>North</text:p>
          </table:table-cell>
          <table:table-cell office:value-type="string">
            <text:p>$1,200.50</text:p>
          </table:table-cell>
          <table:table-cell office:value-type="float" office:value="1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</text:p>
          </table:table-cell>
          <table:table-cell/>
          <table:table-cell/>
          <table:table-cell/>
          <table:table-cell office:value-type="string">
            <text:p>South</text:p>
          </table:table-cell>
          <table:table-cell office:value-type="string">
            <text:p>800</text:p>
          </table:table-cell>
          <table:table-cell office:value-type="float" office:value="8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4</text:p>
          </table:table-cell>
          <table:table-cell/>
          <table:table-cell/>
          <table:table-cell/>
          <table:table-cell office:value-type="string">
            <text:p>North</text:p>
          </table:table-cell>
          <table:table-cell office:value-type="string">
            <text:p>$1,500.00</text:p>
          </table:table-cell>
          <table:table-cell office:value-type="float" office:value="12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5</text:p>
          </table:table-cell>
          <table:table-cell/>
          <table:table-cell/>
          <table:table-cell/>
          <table:table-cell office:value-type="string">
            <text:p>East</text:p>
          </table:table-cell>
          <table:table-cell/>
          <table:table-cell office:value-type="float" office:value="5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etect_outliers</text:p>
          </table:table-cell>
          <table:table-cell office:value-type="string">
            <text:p>analysis</text:p>
          </table:table-cell>
          <table:table-cell office:value-type="string">
            <text:p>detect_outliers</text:p>
          </table:table-cell>
          <table:table-cell office:value-type="string">
            <text:p>IQR outlier detection (also try zscore / isolation_forest in param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method":"iqr"}</text:p>
          </table:table-cell>
          <table:table-cell office:value-type="string">
            <text:p>&gt;= 1</text:p>
          </table:table-cell>
          <table:table-cell office:value-type="formula" table:formula="of:=PYTHON(&quot;from writeragent.scripting.analysis import run_analysis; run_analysis({&quot;&quot;helper&quot;&quot;:&quot;&quot;detect_outliers&quot;&quot;,&quot;&quot;params&quot;&quot;:{&quot;&quot;method&quot;&quot;:&quot;&quot;iqr&quot;&quot;}}, data, {})[&quot;&quot;metrics&quot;&quot;][&quot;&quot;outlier_count&quot;&quot;]&quot;;E18:E23)"/>
          <table:table-cell office:value-type="string">
            <text:p>Analysis Helpers → [Analysis] detect_outliers</text:p>
          </table:table-cell>
          <table:table-cell office:value-type="string">
            <text:p>analyze_data helper=detect_outliers data_range=analysis.E18:E23 params={"method":"iqr"}</text:p>
          </table:table-cell>
          <table:table-cell office:value-type="string">
            <text:p>Param variants: method=zscore, isolation_forest; check_mode: scalar</text:p>
          </table:table-cell>
        </table:table-row>
        <table:table-row>
          <table:table-cell office:value-type="string">
            <text:p>row_1</text:p>
          </table:table-cell>
          <table:table-cell/>
          <table:table-cell/>
          <table:table-cell/>
          <table:table-cell office:value-type="string">
            <text:p>Valu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</text:p>
          </table:table-cell>
          <table:table-cell/>
          <table:table-cell/>
          <table:table-cell/>
          <table:table-cell office:value-type="float" office:value="1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</text:p>
          </table:table-cell>
          <table:table-cell/>
          <table:table-cell/>
          <table:table-cell/>
          <table:table-cell office:value-type="float" office:value="2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4</text:p>
          </table:table-cell>
          <table:table-cell/>
          <table:table-cell/>
          <table:table-cell/>
          <table:table-cell office:value-type="float" office:value="3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5</text:p>
          </table:table-cell>
          <table:table-cell/>
          <table:table-cell/>
          <table:table-cell/>
          <table:table-cell office:value-type="float" office:value="4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6</text:p>
          </table:table-cell>
          <table:table-cell/>
          <table:table-cell/>
          <table:table-cell/>
          <table:table-cell office:value-type="float" office:value="1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quick_stats</text:p>
          </table:table-cell>
          <table:table-cell office:value-type="string">
            <text:p>analysis</text:p>
          </table:table-cell>
          <table:table-cell office:value-type="string">
            <text:p>quick_stats</text:p>
          </table:table-cell>
          <table:table-cell office:value-type="string">
            <text:p>Compact metric car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}</text:p>
          </table:table-cell>
          <table:table-cell office:value-type="string">
            <text:p>4</text:p>
          </table:table-cell>
          <table:table-cell office:value-type="formula" table:formula="of:=PYTHON(&quot;from writeragent.scripting.analysis import run_analysis; run_analysis({&quot;&quot;helper&quot;&quot;:&quot;&quot;quick_stats&quot;&quot;,&quot;&quot;params&quot;&quot;:{}}, data, {})[&quot;&quot;metrics&quot;&quot;][&quot;&quot;record_count&quot;&quot;]&quot;;E26:G30)"/>
          <table:table-cell office:value-type="string">
            <text:p>Analysis Helpers → [Analysis] quick_stats</text:p>
          </table:table-cell>
          <table:table-cell office:value-type="string">
            <text:p>analyze_data helper=quick_stats data_range=analysis.E26:G30</text:p>
          </table:table-cell>
          <table:table-cell office:value-type="string">
            <text:p>check_mode: scalar</text:p>
          </table:table-cell>
        </table:table-row>
        <table:table-row>
          <table:table-cell office:value-type="string">
            <text:p>row_1</text:p>
          </table:table-cell>
          <table:table-cell/>
          <table:table-cell/>
          <table:table-cell/>
          <table:table-cell office:value-type="string">
            <text:p>Region</text:p>
          </table:table-cell>
          <table:table-cell office:value-type="string">
            <text:p>Sales</text:p>
          </table:table-cell>
          <table:table-cell office:value-type="string">
            <text:p>Unit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</text:p>
          </table:table-cell>
          <table:table-cell/>
          <table:table-cell/>
          <table:table-cell/>
          <table:table-cell office:value-type="string">
            <text:p>North</text:p>
          </table:table-cell>
          <table:table-cell office:value-type="string">
            <text:p>$1,200.50</text:p>
          </table:table-cell>
          <table:table-cell office:value-type="float" office:value="1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</text:p>
          </table:table-cell>
          <table:table-cell/>
          <table:table-cell/>
          <table:table-cell/>
          <table:table-cell office:value-type="string">
            <text:p>South</text:p>
          </table:table-cell>
          <table:table-cell office:value-type="string">
            <text:p>800</text:p>
          </table:table-cell>
          <table:table-cell office:value-type="float" office:value="8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4</text:p>
          </table:table-cell>
          <table:table-cell/>
          <table:table-cell/>
          <table:table-cell/>
          <table:table-cell office:value-type="string">
            <text:p>North</text:p>
          </table:table-cell>
          <table:table-cell office:value-type="string">
            <text:p>$1,500.00</text:p>
          </table:table-cell>
          <table:table-cell office:value-type="float" office:value="12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5</text:p>
          </table:table-cell>
          <table:table-cell/>
          <table:table-cell/>
          <table:table-cell/>
          <table:table-cell office:value-type="string">
            <text:p>East</text:p>
          </table:table-cell>
          <table:table-cell/>
          <table:table-cell office:value-type="float" office:value="5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ormat_currency</text:p>
          </table:table-cell>
          <table:table-cell office:value-type="string">
            <text:p>analysis</text:p>
          </table:table-cell>
          <table:table-cell office:value-type="string">
            <text:p>format_currency</text:p>
          </table:table-cell>
          <table:table-cell office:value-type="string">
            <text:p>Display formatter — currenc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}</text:p>
          </table:table-cell>
          <table:table-cell office:value-type="string">
            <text:p>$1,234.50</text:p>
          </table:table-cell>
          <table:table-cell office:value-type="formula" table:formula="of:=PYTHON(&quot;from writeragent.scripting.analysis import format_currency; format_currency([data[0][0] if isinstance(data[0], list) else data[0]])[0]&quot;;E33)"/>
          <table:table-cell office:value-type="string">
            <text:p>Analysis Helpers → [Analysis] format_currency</text:p>
          </table:table-cell>
          <table:table-cell office:value-type="string">
            <text:p>analyze_data helper=format_currency data_range=analysis.E33</text:p>
          </table:table-cell>
          <table:table-cell office:value-type="string">
            <text:p>check_mode: scalar</text:p>
          </table:table-cell>
        </table:table-row>
        <table:table-row>
          <table:table-cell office:value-type="string">
            <text:p>row_1</text:p>
          </table:table-cell>
          <table:table-cell/>
          <table:table-cell/>
          <table:table-cell/>
          <table:table-cell office:value-type="float" office:value="1234.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ormat_percent</text:p>
          </table:table-cell>
          <table:table-cell office:value-type="string">
            <text:p>analysis</text:p>
          </table:table-cell>
          <table:table-cell office:value-type="string">
            <text:p>format_percent</text:p>
          </table:table-cell>
          <table:table-cell office:value-type="string">
            <text:p>Display formatter — perc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}</text:p>
          </table:table-cell>
          <table:table-cell office:value-type="string">
            <text:p>12.5%</text:p>
          </table:table-cell>
          <table:table-cell office:value-type="formula" table:formula="of:=PYTHON(&quot;from writeragent.scripting.analysis import format_percent; format_percent([data[0][0] if isinstance(data[0], list) else data[0]])[0]&quot;;E36)"/>
          <table:table-cell office:value-type="string">
            <text:p>Analysis Helpers → [Analysis] format_percent</text:p>
          </table:table-cell>
          <table:table-cell office:value-type="string">
            <text:p>analyze_data helper=format_percent data_range=analysis.E36</text:p>
          </table:table-cell>
          <table:table-cell office:value-type="string">
            <text:p>check_mode: scalar</text:p>
          </table:table-cell>
        </table:table-row>
        <table:table-row>
          <table:table-cell office:value-type="string">
            <text:p>row_1</text:p>
          </table:table-cell>
          <table:table-cell/>
          <table:table-cell/>
          <table:table-cell/>
          <table:table-cell office:value-type="float" office:value="0.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ean_and_prepare</text:p>
          </table:table-cell>
          <table:table-cell office:value-type="string">
            <text:p>analysis</text:p>
          </table:table-cell>
          <table:table-cell office:value-type="string">
            <text:p>clean_and_prepare</text:p>
          </table:table-cell>
          <table:table-cell office:value-type="string">
            <text:p>Dedupe + simple imputa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fill_numeric":"median"}</text:p>
          </table:table-cell>
          <table:table-cell office:value-type="string">
            <text:p>4</text:p>
          </table:table-cell>
          <table:table-cell office:value-type="formula" table:formula="of:=PYTHON(&quot;from writeragent.scripting.analysis import run_analysis; run_analysis({&quot;&quot;helper&quot;&quot;:&quot;&quot;clean_and_prepare&quot;&quot;,&quot;&quot;params&quot;&quot;:{&quot;&quot;fill_numeric&quot;&quot;:&quot;&quot;median&quot;&quot;}}, data, {})[&quot;&quot;metrics&quot;&quot;][&quot;&quot;row_count&quot;&quot;]&quot;;E39:G43)"/>
          <table:table-cell office:value-type="string">
            <text:p>Analysis Helpers → [Analysis] clean_and_prepare</text:p>
          </table:table-cell>
          <table:table-cell office:value-type="string">
            <text:p>analyze_data helper=clean_and_prepare data_range=analysis.E39:G43 params={"fill_numeric":"median"}</text:p>
          </table:table-cell>
          <table:table-cell office:value-type="string">
            <text:p>check_mode: scalar</text:p>
          </table:table-cell>
        </table:table-row>
        <table:table-row>
          <table:table-cell office:value-type="string">
            <text:p>row_1</text:p>
          </table:table-cell>
          <table:table-cell/>
          <table:table-cell/>
          <table:table-cell/>
          <table:table-cell office:value-type="string">
            <text:p>Region</text:p>
          </table:table-cell>
          <table:table-cell office:value-type="string">
            <text:p>Sales</text:p>
          </table:table-cell>
          <table:table-cell office:value-type="string">
            <text:p>Unit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</text:p>
          </table:table-cell>
          <table:table-cell/>
          <table:table-cell/>
          <table:table-cell/>
          <table:table-cell office:value-type="string">
            <text:p>North</text:p>
          </table:table-cell>
          <table:table-cell office:value-type="string">
            <text:p>$1,200.50</text:p>
          </table:table-cell>
          <table:table-cell office:value-type="float" office:value="1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</text:p>
          </table:table-cell>
          <table:table-cell/>
          <table:table-cell/>
          <table:table-cell/>
          <table:table-cell office:value-type="string">
            <text:p>South</text:p>
          </table:table-cell>
          <table:table-cell office:value-type="string">
            <text:p>800</text:p>
          </table:table-cell>
          <table:table-cell office:value-type="float" office:value="8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4</text:p>
          </table:table-cell>
          <table:table-cell/>
          <table:table-cell/>
          <table:table-cell/>
          <table:table-cell office:value-type="string">
            <text:p>North</text:p>
          </table:table-cell>
          <table:table-cell office:value-type="string">
            <text:p>$1,500.00</text:p>
          </table:table-cell>
          <table:table-cell office:value-type="float" office:value="12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5</text:p>
          </table:table-cell>
          <table:table-cell/>
          <table:table-cell/>
          <table:table-cell/>
          <table:table-cell office:value-type="string">
            <text:p>East</text:p>
          </table:table-cell>
          <table:table-cell/>
          <table:table-cell office:value-type="float" office:value="5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ivot_aggregate</text:p>
          </table:table-cell>
          <table:table-cell office:value-type="string">
            <text:p>analysis</text:p>
          </table:table-cell>
          <table:table-cell office:value-type="string">
            <text:p>pivot_aggregate</text:p>
          </table:table-cell>
          <table:table-cell office:value-type="string">
            <text:p>Pivot table wrapper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index":"Region","columns":"Quarter","values":"Sales","aggfunc":"sum"}</text:p>
          </table:table-cell>
          <table:table-cell office:value-type="string">
            <text:p>&gt;= 2</text:p>
          </table:table-cell>
          <table:table-cell office:value-type="formula" table:formula="of:=PYTHON(&quot;from writeragent.scripting.analysis import run_analysis; run_analysis({&quot;&quot;helper&quot;&quot;:&quot;&quot;pivot_aggregate&quot;&quot;,&quot;&quot;params&quot;&quot;:{&quot;&quot;index&quot;&quot;:&quot;&quot;Region&quot;&quot;,&quot;&quot;columns&quot;&quot;:&quot;&quot;Quarter&quot;&quot;,&quot;&quot;values&quot;&quot;:&quot;&quot;Sales&quot;&quot;,&quot;&quot;aggfunc&quot;&quot;:&quot;&quot;sum&quot;&quot;}}, data, {})[&quot;&quot;tables&quot;&quot;][0][&quot;&quot;total_rows&quot;&quot;]&quot;;E46:G50)"/>
          <table:table-cell office:value-type="string">
            <text:p>Analysis Helpers → [Analysis] pivot_aggregate</text:p>
          </table:table-cell>
          <table:table-cell office:value-type="string">
            <text:p>analyze_data helper=pivot_aggregate data_range=analysis.E46:G50 params={"index":"Region","columns":"Quarter","values":"Sales","aggfunc":"sum"}</text:p>
          </table:table-cell>
          <table:table-cell office:value-type="string">
            <text:p>check_mode: scalar</text:p>
          </table:table-cell>
        </table:table-row>
        <table:table-row>
          <table:table-cell office:value-type="string">
            <text:p>row_1</text:p>
          </table:table-cell>
          <table:table-cell/>
          <table:table-cell/>
          <table:table-cell/>
          <table:table-cell office:value-type="string">
            <text:p>Region</text:p>
          </table:table-cell>
          <table:table-cell office:value-type="string">
            <text:p>Quarter</text:p>
          </table:table-cell>
          <table:table-cell office:value-type="string">
            <text:p>S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</text:p>
          </table:table-cell>
          <table:table-cell/>
          <table:table-cell/>
          <table:table-cell/>
          <table:table-cell office:value-type="string">
            <text:p>North</text:p>
          </table:table-cell>
          <table:table-cell office:value-type="string">
            <text:p>Q1</text:p>
          </table:table-cell>
          <table:table-cell office:value-type="float" office:value="1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</text:p>
          </table:table-cell>
          <table:table-cell/>
          <table:table-cell/>
          <table:table-cell/>
          <table:table-cell office:value-type="string">
            <text:p>North</text:p>
          </table:table-cell>
          <table:table-cell office:value-type="string">
            <text:p>Q2</text:p>
          </table:table-cell>
          <table:table-cell office:value-type="float" office:value="12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4</text:p>
          </table:table-cell>
          <table:table-cell/>
          <table:table-cell/>
          <table:table-cell/>
          <table:table-cell office:value-type="string">
            <text:p>South</text:p>
          </table:table-cell>
          <table:table-cell office:value-type="string">
            <text:p>Q1</text:p>
          </table:table-cell>
          <table:table-cell office:value-type="float" office:value="8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5</text:p>
          </table:table-cell>
          <table:table-cell/>
          <table:table-cell/>
          <table:table-cell/>
          <table:table-cell office:value-type="string">
            <text:p>South</text:p>
          </table:table-cell>
          <table:table-cell office:value-type="string">
            <text:p>Q2</text:p>
          </table:table-cell>
          <table:table-cell office:value-type="float" office:value="9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roup_summary</text:p>
          </table:table-cell>
          <table:table-cell office:value-type="string">
            <text:p>analysis</text:p>
          </table:table-cell>
          <table:table-cell office:value-type="string">
            <text:p>group_summary</text:p>
          </table:table-cell>
          <table:table-cell office:value-type="string">
            <text:p>Group-by aggrega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by":"Region","metrics":["Sales"],"aggfunc":"sum"}</text:p>
          </table:table-cell>
          <table:table-cell office:value-type="string">
            <text:p>&gt;= 2</text:p>
          </table:table-cell>
          <table:table-cell office:value-type="formula" table:formula="of:=PYTHON(&quot;from writeragent.scripting.analysis import run_analysis; run_analysis({&quot;&quot;helper&quot;&quot;:&quot;&quot;group_summary&quot;&quot;,&quot;&quot;params&quot;&quot;:{&quot;&quot;by&quot;&quot;:&quot;&quot;Region&quot;&quot;,&quot;&quot;metrics&quot;&quot;:[&quot;&quot;Sales&quot;&quot;],&quot;&quot;aggfunc&quot;&quot;:&quot;&quot;sum&quot;&quot;}}, data, {})[&quot;&quot;metrics&quot;&quot;][&quot;&quot;group_count&quot;&quot;]&quot;;E53:G57)"/>
          <table:table-cell office:value-type="string">
            <text:p>Analysis Helpers → [Analysis] group_summary</text:p>
          </table:table-cell>
          <table:table-cell office:value-type="string">
            <text:p>analyze_data helper=group_summary data_range=analysis.E53:G57 params={"by":"Region","metrics":["Sales"],"aggfunc":"sum"}</text:p>
          </table:table-cell>
          <table:table-cell office:value-type="string">
            <text:p>check_mode: scalar</text:p>
          </table:table-cell>
        </table:table-row>
        <table:table-row>
          <table:table-cell office:value-type="string">
            <text:p>row_1</text:p>
          </table:table-cell>
          <table:table-cell/>
          <table:table-cell/>
          <table:table-cell/>
          <table:table-cell office:value-type="string">
            <text:p>Region</text:p>
          </table:table-cell>
          <table:table-cell office:value-type="string">
            <text:p>Sales</text:p>
          </table:table-cell>
          <table:table-cell office:value-type="string">
            <text:p>Unit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</text:p>
          </table:table-cell>
          <table:table-cell/>
          <table:table-cell/>
          <table:table-cell/>
          <table:table-cell office:value-type="string">
            <text:p>North</text:p>
          </table:table-cell>
          <table:table-cell office:value-type="string">
            <text:p>$1,200.50</text:p>
          </table:table-cell>
          <table:table-cell office:value-type="float" office:value="1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</text:p>
          </table:table-cell>
          <table:table-cell/>
          <table:table-cell/>
          <table:table-cell/>
          <table:table-cell office:value-type="string">
            <text:p>South</text:p>
          </table:table-cell>
          <table:table-cell office:value-type="string">
            <text:p>800</text:p>
          </table:table-cell>
          <table:table-cell office:value-type="float" office:value="8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4</text:p>
          </table:table-cell>
          <table:table-cell/>
          <table:table-cell/>
          <table:table-cell/>
          <table:table-cell office:value-type="string">
            <text:p>North</text:p>
          </table:table-cell>
          <table:table-cell office:value-type="string">
            <text:p>$1,500.00</text:p>
          </table:table-cell>
          <table:table-cell office:value-type="float" office:value="12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5</text:p>
          </table:table-cell>
          <table:table-cell/>
          <table:table-cell/>
          <table:table-cell/>
          <table:table-cell office:value-type="string">
            <text:p>East</text:p>
          </table:table-cell>
          <table:table-cell/>
          <table:table-cell office:value-type="float" office:value="5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mpare_periods</text:p>
          </table:table-cell>
          <table:table-cell office:value-type="string">
            <text:p>analysis</text:p>
          </table:table-cell>
          <table:table-cell office:value-type="string">
            <text:p>compare_periods</text:p>
          </table:table-cell>
          <table:table-cell office:value-type="string">
            <text:p>YoY/QoQ/MoM compariso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date_col":"Date","value_col":"Revenue","period":"Y"}</text:p>
          </table:table-cell>
          <table:table-cell office:value-type="string">
            <text:p>ok</text:p>
          </table:table-cell>
          <table:table-cell office:value-type="formula" table:formula="of:=PYTHON(&quot;from writeragent.scripting.analysis import run_analysis; run_analysis({&quot;&quot;helper&quot;&quot;:&quot;&quot;compare_periods&quot;&quot;,&quot;&quot;params&quot;&quot;:{&quot;&quot;date_col&quot;&quot;:&quot;&quot;Date&quot;&quot;,&quot;&quot;value_col&quot;&quot;:&quot;&quot;Revenue&quot;&quot;,&quot;&quot;period&quot;&quot;:&quot;&quot;Y&quot;&quot;}}, data, {})[&quot;&quot;status&quot;&quot;]&quot;;E60:F64)"/>
          <table:table-cell office:value-type="string">
            <text:p>Analysis Helpers → [Analysis] compare_periods</text:p>
          </table:table-cell>
          <table:table-cell office:value-type="string">
            <text:p>analyze_data helper=compare_periods data_range=analysis.E60:F64 params={"date_col":"Date","value_col":"Revenue","period":"Y"}</text:p>
          </table:table-cell>
          <table:table-cell office:value-type="string">
            <text:p>Full report should include a change column in tables; check_mode: scalar</text:p>
          </table:table-cell>
        </table:table-row>
        <table:table-row>
          <table:table-cell office:value-type="string">
            <text:p>row_1</text:p>
          </table:table-cell>
          <table:table-cell/>
          <table:table-cell/>
          <table:table-cell/>
          <table:table-cell office:value-type="string">
            <text:p>Date</text:p>
          </table:table-cell>
          <table:table-cell office:value-type="string">
            <text:p>Revenu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</text:p>
          </table:table-cell>
          <table:table-cell/>
          <table:table-cell/>
          <table:table-cell/>
          <table:table-cell office:value-type="string">
            <text:p>2023-01-15</text:p>
          </table:table-cell>
          <table:table-cell office:value-type="float" office:value="1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</text:p>
          </table:table-cell>
          <table:table-cell/>
          <table:table-cell/>
          <table:table-cell/>
          <table:table-cell office:value-type="string">
            <text:p>2023-06-15</text:p>
          </table:table-cell>
          <table:table-cell office:value-type="float" office:value="15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4</text:p>
          </table:table-cell>
          <table:table-cell/>
          <table:table-cell/>
          <table:table-cell/>
          <table:table-cell office:value-type="string">
            <text:p>2024-01-15</text:p>
          </table:table-cell>
          <table:table-cell office:value-type="float" office:value="2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5</text:p>
          </table:table-cell>
          <table:table-cell/>
          <table:table-cell/>
          <table:table-cell/>
          <table:table-cell office:value-type="string">
            <text:p>2024-06-15</text:p>
          </table:table-cell>
          <table:table-cell office:value-type="float" office:value="25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rrelation_matrix</text:p>
          </table:table-cell>
          <table:table-cell office:value-type="string">
            <text:p>analysis</text:p>
          </table:table-cell>
          <table:table-cell office:value-type="string">
            <text:p>correlation_matrix</text:p>
          </table:table-cell>
          <table:table-cell office:value-type="string">
            <text:p>Top correlated pair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}</text:p>
          </table:table-cell>
          <table:table-cell office:value-type="string">
            <text:p>&gt;= 1</text:p>
          </table:table-cell>
          <table:table-cell office:value-type="formula" table:formula="of:=PYTHON(&quot;from writeragent.scripting.analysis import run_analysis; run_analysis({&quot;&quot;helper&quot;&quot;:&quot;&quot;correlation_matrix&quot;&quot;,&quot;&quot;params&quot;&quot;:{}}, data, {})[&quot;&quot;metrics&quot;&quot;][&quot;&quot;pair_count&quot;&quot;]&quot;;E67:G70)"/>
          <table:table-cell office:value-type="string">
            <text:p>Analysis Helpers → [Analysis] correlation_matrix</text:p>
          </table:table-cell>
          <table:table-cell office:value-type="string">
            <text:p>analyze_data helper=correlation_matrix data_range=analysis.E67:G70</text:p>
          </table:table-cell>
          <table:table-cell office:value-type="string">
            <text:p>check_mode: scalar</text:p>
          </table:table-cell>
        </table:table-row>
        <table:table-row>
          <table:table-cell office:value-type="string">
            <text:p>row_1</text:p>
          </table:table-cell>
          <table:table-cell/>
          <table:table-cell/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</text:p>
          </table:table-cell>
          <table:table-cell/>
          <table:table-cell/>
          <table:table-cell/>
          <table:table-cell office:value-type="float" office:value="1.0"/>
          <table:table-cell office:value-type="float" office:value="2.0"/>
          <table:table-cell office:value-type="float" office:value="3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</text:p>
          </table:table-cell>
          <table:table-cell/>
          <table:table-cell/>
          <table:table-cell/>
          <table:table-cell office:value-type="float" office:value="2.0"/>
          <table:table-cell office:value-type="float" office:value="4.0"/>
          <table:table-cell office:value-type="float" office:value="6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4</text:p>
          </table:table-cell>
          <table:table-cell/>
          <table:table-cell/>
          <table:table-cell/>
          <table:table-cell office:value-type="float" office:value="3.0"/>
          <table:table-cell office:value-type="float" office:value="6.0"/>
          <table:table-cell office:value-type="float" office:value="9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un_regression</text:p>
          </table:table-cell>
          <table:table-cell office:value-type="string">
            <text:p>analysis</text:p>
          </table:table-cell>
          <table:table-cell office:value-type="string">
            <text:p>run_regression</text:p>
          </table:table-cell>
          <table:table-cell office:value-type="string">
            <text:p>OLS via statsmodel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target":"y","features":["x"]}</text:p>
          </table:table-cell>
          <table:table-cell office:value-type="string">
            <text:p>~1.0</text:p>
          </table:table-cell>
          <table:table-cell office:value-type="formula" table:formula="of:=PYTHON(&quot;from writeragent.scripting.analysis import run_analysis; run_analysis({&quot;&quot;helper&quot;&quot;:&quot;&quot;run_regression&quot;&quot;,&quot;&quot;params&quot;&quot;:{&quot;&quot;target&quot;&quot;:&quot;&quot;y&quot;&quot;,&quot;&quot;features&quot;&quot;:[&quot;&quot;x&quot;&quot;]}}, data, {})[&quot;&quot;metrics&quot;&quot;][&quot;&quot;r_squared&quot;&quot;]&quot;;E73:F77)"/>
          <table:table-cell office:value-type="string">
            <text:p>Analysis Helpers → [Analysis] run_regression</text:p>
          </table:table-cell>
          <table:table-cell office:value-type="string">
            <text:p>analyze_data helper=run_regression data_range=analysis.E73:F77 params={"target":"y","features":["x"]}</text:p>
          </table:table-cell>
          <table:table-cell office:value-type="string">
            <text:p>requires: statsmodels; check_mode: scalar</text:p>
          </table:table-cell>
        </table:table-row>
        <table:table-row>
          <table:table-cell office:value-type="string">
            <text:p>row_1</text:p>
          </table:table-cell>
          <table:table-cell/>
          <table:table-cell/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</text:p>
          </table:table-cell>
          <table:table-cell/>
          <table:table-cell/>
          <table:table-cell/>
          <table:table-cell office:value-type="float" office:value="1.0"/>
          <table:table-cell office:value-type="float" office:value="2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</text:p>
          </table:table-cell>
          <table:table-cell/>
          <table:table-cell/>
          <table:table-cell/>
          <table:table-cell office:value-type="float" office:value="2.0"/>
          <table:table-cell office:value-type="float" office:value="4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4</text:p>
          </table:table-cell>
          <table:table-cell/>
          <table:table-cell/>
          <table:table-cell/>
          <table:table-cell office:value-type="float" office:value="3.0"/>
          <table:table-cell office:value-type="float" office:value="6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5</text:p>
          </table:table-cell>
          <table:table-cell/>
          <table:table-cell/>
          <table:table-cell/>
          <table:table-cell office:value-type="float" office:value="4.0"/>
          <table:table-cell office:value-type="float" office:value="8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uster_numeric</text:p>
          </table:table-cell>
          <table:table-cell office:value-type="string">
            <text:p>analysis</text:p>
          </table:table-cell>
          <table:table-cell office:value-type="string">
            <text:p>cluster_numeric</text:p>
          </table:table-cell>
          <table:table-cell office:value-type="string">
            <text:p>KMeans centroid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n_clusters":2}</text:p>
          </table:table-cell>
          <table:table-cell office:value-type="string">
            <text:p>2</text:p>
          </table:table-cell>
          <table:table-cell office:value-type="formula" table:formula="of:=PYTHON(&quot;from writeragent.scripting.analysis import run_analysis; run_analysis({&quot;&quot;helper&quot;&quot;:&quot;&quot;cluster_numeric&quot;&quot;,&quot;&quot;params&quot;&quot;:{&quot;&quot;n_clusters&quot;&quot;:2}}, data, {})[&quot;&quot;metrics&quot;&quot;][&quot;&quot;n_clusters&quot;&quot;]&quot;;E80:F84)"/>
          <table:table-cell office:value-type="string">
            <text:p>Analysis Helpers → [Analysis] cluster_numeric</text:p>
          </table:table-cell>
          <table:table-cell office:value-type="string">
            <text:p>analyze_data helper=cluster_numeric data_range=analysis.E80:F84 params={"n_clusters":2}</text:p>
          </table:table-cell>
          <table:table-cell office:value-type="string">
            <text:p>check_mode: scalar</text:p>
          </table:table-cell>
        </table:table-row>
        <table:table-row>
          <table:table-cell office:value-type="string">
            <text:p>row_1</text:p>
          </table:table-cell>
          <table:table-cell/>
          <table:table-cell/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</text:p>
          </table:table-cell>
          <table:table-cell/>
          <table:table-cell/>
          <table:table-cell/>
          <table:table-cell office:value-type="float" office:value="1.0"/>
          <table:table-cell office:value-type="float" office:value="1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</text:p>
          </table:table-cell>
          <table:table-cell/>
          <table:table-cell/>
          <table:table-cell/>
          <table:table-cell office:value-type="float" office:value="1.1"/>
          <table:table-cell office:value-type="float" office:value="1.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4</text:p>
          </table:table-cell>
          <table:table-cell/>
          <table:table-cell/>
          <table:table-cell/>
          <table:table-cell office:value-type="float" office:value="5.0"/>
          <table:table-cell office:value-type="float" office:value="5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5</text:p>
          </table:table-cell>
          <table:table-cell/>
          <table:table-cell/>
          <table:table-cell/>
          <table:table-cell office:value-type="float" office:value="5.2"/>
          <table:table-cell office:value-type="float" office:value="4.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nte_carlo</text:p>
          </table:table-cell>
          <table:table-cell office:value-type="string">
            <text:p>analysis</text:p>
          </table:table-cell>
          <table:table-cell office:value-type="string">
            <text:p>monte_carlo</text:p>
          </table:table-cell>
          <table:table-cell office:value-type="string">
            <text:p>Monte Carlo resampling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sims":50,"bust":-0.05,"goal":0.05}</text:p>
          </table:table-cell>
          <table:table-cell office:value-type="string">
            <text:p>50</text:p>
          </table:table-cell>
          <table:table-cell office:value-type="formula" table:formula="of:=PYTHON(&quot;from writeragent.scripting.analysis import run_analysis; run_analysis({&quot;&quot;helper&quot;&quot;:&quot;&quot;monte_carlo&quot;&quot;,&quot;&quot;params&quot;&quot;:{&quot;&quot;sims&quot;&quot;:50,&quot;&quot;bust&quot;&quot;:-0.05,&quot;&quot;goal&quot;&quot;:0.05}}, data, {})[&quot;&quot;metrics&quot;&quot;][&quot;&quot;simulations&quot;&quot;]&quot;;E87:E92)"/>
          <table:table-cell office:value-type="string">
            <text:p>Analysis Helpers → [Analysis] monte_carlo</text:p>
          </table:table-cell>
          <table:table-cell office:value-type="string">
            <text:p>analyze_data helper=monte_carlo data_range=analysis.E87:E92 params={"sims":50,"bust":-0.05,"goal":0.05}</text:p>
          </table:table-cell>
          <table:table-cell office:value-type="string">
            <text:p>requires: pandas-montecarlo; check_mode: scalar</text:p>
          </table:table-cell>
        </table:table-row>
        <table:table-row>
          <table:table-cell office:value-type="string">
            <text:p>row_1</text:p>
          </table:table-cell>
          <table:table-cell/>
          <table:table-cell/>
          <table:table-cell/>
          <table:table-cell office:value-type="string">
            <text:p>Retur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</text:p>
          </table:table-cell>
          <table:table-cell/>
          <table:table-cell/>
          <table:table-cell/>
          <table:table-cell office:value-type="float" office:value="0.0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</text:p>
          </table:table-cell>
          <table:table-cell/>
          <table:table-cell/>
          <table:table-cell/>
          <table:table-cell office:value-type="float" office:value="-0.0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4</text:p>
          </table:table-cell>
          <table:table-cell/>
          <table:table-cell/>
          <table:table-cell/>
          <table:table-cell office:value-type="float" office:value="0.0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5</text:p>
          </table:table-cell>
          <table:table-cell/>
          <table:table-cell/>
          <table:table-cell/>
          <table:table-cell office:value-type="float" office:value="0.0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6</text:p>
          </table:table-cell>
          <table:table-cell/>
          <table:table-cell/>
          <table:table-cell/>
          <table:table-cell office:value-type="float" office:value="-0.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viz">
        <table:table-row>
          <table:table-cell office:value-type="string">
            <text:p>test_id</text:p>
          </table:table-cell>
          <table:table-cell office:value-type="string">
            <text:p>domain</text:p>
          </table:table-cell>
          <table:table-cell office:value-type="string">
            <text:p>helper</text:p>
          </table:table-cell>
          <table:table-cell office:value-type="string">
            <text:p>description</text:p>
          </table:table-cell>
          <table:table-cell office:value-type="string">
            <text:p>col_1</text:p>
          </table:table-cell>
          <table:table-cell office:value-type="string">
            <text:p>col_2</text:p>
          </table:table-cell>
          <table:table-cell office:value-type="string">
            <text:p>col_3</text:p>
          </table:table-cell>
          <table:table-cell office:value-type="string">
            <text:p>col_4</text:p>
          </table:table-cell>
          <table:table-cell office:value-type="string">
            <text:p>col_5</text:p>
          </table:table-cell>
          <table:table-cell office:value-type="string">
            <text:p>col_6</text:p>
          </table:table-cell>
          <table:table-cell office:value-type="string">
            <text:p>col_7</text:p>
          </table:table-cell>
          <table:table-cell office:value-type="string">
            <text:p>col_8</text:p>
          </table:table-cell>
          <table:table-cell office:value-type="string">
            <text:p>col_9</text:p>
          </table:table-cell>
          <table:table-cell office:value-type="string">
            <text:p>params</text:p>
          </table:table-cell>
          <table:table-cell office:value-type="string">
            <text:p>expected_scalar</text:p>
          </table:table-cell>
          <table:table-cell office:value-type="string">
            <text:p>python_formula</text:p>
          </table:table-cell>
          <table:table-cell office:value-type="string">
            <text:p>script_hint</text:p>
          </table:table-cell>
          <table:table-cell office:value-type="string">
            <text:p>chat_prompt</text:p>
          </table:table-cell>
          <table:table-cell office:value-type="string">
            <text:p>notes</text:p>
          </table:table-cell>
        </table:table-row>
        <table:table-row>
          <table:table-cell office:value-type="string" table:number-columns-spanned="19">
            <text:p>[viz]</text:p>
          </table:table-cell>
        </table:table-row>
        <table:table-row>
          <table:table-cell office:value-type="string">
            <text:p>quick_plot</text:p>
          </table:table-cell>
          <table:table-cell office:value-type="string">
            <text:p>viz</text:p>
          </table:table-cell>
          <table:table-cell office:value-type="string">
            <text:p>quick_plot</text:p>
          </table:table-cell>
          <table:table-cell office:value-type="string">
            <text:p>Auto line/bar chart from numeric colum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}</text:p>
          </table:table-cell>
          <table:table-cell office:value-type="string">
            <text:p>ok (chart image on sheet after RPS)</text:p>
          </table:table-cell>
          <table:table-cell office:value-type="formula" table:formula="of:=PYTHON(&quot;from writeragent.scripting.viz import run_viz; run_viz({&quot;&quot;helper&quot;&quot;:&quot;&quot;quick_plot&quot;&quot;,&quot;&quot;params&quot;&quot;:{}}, data, {})[&quot;&quot;status&quot;&quot;]&quot;;E4:G8)"/>
          <table:table-cell office:value-type="string">
            <text:p>Viz Helpers → [Viz] quick_plot</text:p>
          </table:table-cell>
          <table:table-cell office:value-type="string">
            <text:p>plot_data helper=quick_plot data_range=viz.E4:G8</text:p>
          </table:table-cell>
          <table:table-cell office:value-type="string">
            <text:p>Run Python Script inserts chart graphic; =PYTHON() checks status only; requires: matplotlib; check_mode: visual</text:p>
          </table:table-cell>
        </table:table-row>
        <table:table-row>
          <table:table-cell office:value-type="string">
            <text:p>row_1</text:p>
          </table:table-cell>
          <table:table-cell/>
          <table:table-cell/>
          <table:table-cell/>
          <table:table-cell office:value-type="string">
            <text:p>Region</text:p>
          </table:table-cell>
          <table:table-cell office:value-type="string">
            <text:p>Sales</text:p>
          </table:table-cell>
          <table:table-cell office:value-type="string">
            <text:p>Unit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</text:p>
          </table:table-cell>
          <table:table-cell/>
          <table:table-cell/>
          <table:table-cell/>
          <table:table-cell office:value-type="string">
            <text:p>North</text:p>
          </table:table-cell>
          <table:table-cell office:value-type="string">
            <text:p>$1,200.50</text:p>
          </table:table-cell>
          <table:table-cell office:value-type="float" office:value="1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</text:p>
          </table:table-cell>
          <table:table-cell/>
          <table:table-cell/>
          <table:table-cell/>
          <table:table-cell office:value-type="string">
            <text:p>South</text:p>
          </table:table-cell>
          <table:table-cell office:value-type="string">
            <text:p>800</text:p>
          </table:table-cell>
          <table:table-cell office:value-type="float" office:value="8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4</text:p>
          </table:table-cell>
          <table:table-cell/>
          <table:table-cell/>
          <table:table-cell/>
          <table:table-cell office:value-type="string">
            <text:p>North</text:p>
          </table:table-cell>
          <table:table-cell office:value-type="string">
            <text:p>$1,500.00</text:p>
          </table:table-cell>
          <table:table-cell office:value-type="float" office:value="12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5</text:p>
          </table:table-cell>
          <table:table-cell/>
          <table:table-cell/>
          <table:table-cell/>
          <table:table-cell office:value-type="string">
            <text:p>East</text:p>
          </table:table-cell>
          <table:table-cell/>
          <table:table-cell office:value-type="float" office:value="5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rrelation_heatmap</text:p>
          </table:table-cell>
          <table:table-cell office:value-type="string">
            <text:p>viz</text:p>
          </table:table-cell>
          <table:table-cell office:value-type="string">
            <text:p>correlation_heatmap</text:p>
          </table:table-cell>
          <table:table-cell office:value-type="string">
            <text:p>Pairwise correlation heatmap (seaborn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method":"pearson"}</text:p>
          </table:table-cell>
          <table:table-cell office:value-type="string">
            <text:p>ok (heatmap image on sheet after RPS)</text:p>
          </table:table-cell>
          <table:table-cell office:value-type="formula" table:formula="of:=PYTHON(&quot;from writeragent.scripting.viz import run_viz; run_viz({&quot;&quot;helper&quot;&quot;:&quot;&quot;correlation_heatmap&quot;&quot;,&quot;&quot;params&quot;&quot;:{&quot;&quot;method&quot;&quot;:&quot;&quot;pearson&quot;&quot;}}, data, {})[&quot;&quot;status&quot;&quot;]&quot;;E11:G14)"/>
          <table:table-cell office:value-type="string">
            <text:p>Viz Helpers → [Viz] correlation_heatmap</text:p>
          </table:table-cell>
          <table:table-cell office:value-type="string">
            <text:p>plot_data helper=correlation_heatmap data_range=viz.E11:G14 params={"method":"pearson"}</text:p>
          </table:table-cell>
          <table:table-cell office:value-type="string">
            <text:p>requires: seaborn; check_mode: visual</text:p>
          </table:table-cell>
        </table:table-row>
        <table:table-row>
          <table:table-cell office:value-type="string">
            <text:p>row_1</text:p>
          </table:table-cell>
          <table:table-cell/>
          <table:table-cell/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</text:p>
          </table:table-cell>
          <table:table-cell/>
          <table:table-cell/>
          <table:table-cell/>
          <table:table-cell office:value-type="float" office:value="1.0"/>
          <table:table-cell office:value-type="float" office:value="2.0"/>
          <table:table-cell office:value-type="float" office:value="3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</text:p>
          </table:table-cell>
          <table:table-cell/>
          <table:table-cell/>
          <table:table-cell/>
          <table:table-cell office:value-type="float" office:value="2.0"/>
          <table:table-cell office:value-type="float" office:value="4.0"/>
          <table:table-cell office:value-type="float" office:value="6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4</text:p>
          </table:table-cell>
          <table:table-cell/>
          <table:table-cell/>
          <table:table-cell/>
          <table:table-cell office:value-type="float" office:value="3.0"/>
          <table:table-cell office:value-type="float" office:value="6.0"/>
          <table:table-cell office:value-type="float" office:value="9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me_series_plot</text:p>
          </table:table-cell>
          <table:table-cell office:value-type="string">
            <text:p>viz</text:p>
          </table:table-cell>
          <table:table-cell office:value-type="string">
            <text:p>time_series_plot</text:p>
          </table:table-cell>
          <table:table-cell office:value-type="string">
            <text:p>Date-indexed line plo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date_col":"Date","value_col":"Revenue"}</text:p>
          </table:table-cell>
          <table:table-cell office:value-type="string">
            <text:p>ok (line chart on sheet after RPS)</text:p>
          </table:table-cell>
          <table:table-cell office:value-type="formula" table:formula="of:=PYTHON(&quot;from writeragent.scripting.viz import run_viz; run_viz({&quot;&quot;helper&quot;&quot;:&quot;&quot;time_series_plot&quot;&quot;,&quot;&quot;params&quot;&quot;:{&quot;&quot;date_col&quot;&quot;:&quot;&quot;Date&quot;&quot;,&quot;&quot;value_col&quot;&quot;:&quot;&quot;Revenue&quot;&quot;}}, data, {})[&quot;&quot;status&quot;&quot;]&quot;;E17:F21)"/>
          <table:table-cell office:value-type="string">
            <text:p>Viz Helpers → [Viz] time_series_plot</text:p>
          </table:table-cell>
          <table:table-cell office:value-type="string">
            <text:p>plot_data helper=time_series_plot data_range=viz.E17:F21 params={"date_col":"Date","value_col":"Revenue"}</text:p>
          </table:table-cell>
          <table:table-cell office:value-type="string">
            <text:p>requires: matplotlib; check_mode: visual</text:p>
          </table:table-cell>
        </table:table-row>
        <table:table-row>
          <table:table-cell office:value-type="string">
            <text:p>row_1</text:p>
          </table:table-cell>
          <table:table-cell/>
          <table:table-cell/>
          <table:table-cell/>
          <table:table-cell office:value-type="string">
            <text:p>Date</text:p>
          </table:table-cell>
          <table:table-cell office:value-type="string">
            <text:p>Revenu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</text:p>
          </table:table-cell>
          <table:table-cell/>
          <table:table-cell/>
          <table:table-cell/>
          <table:table-cell office:value-type="string">
            <text:p>2023-01-15</text:p>
          </table:table-cell>
          <table:table-cell office:value-type="float" office:value="1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</text:p>
          </table:table-cell>
          <table:table-cell/>
          <table:table-cell/>
          <table:table-cell/>
          <table:table-cell office:value-type="string">
            <text:p>2023-06-15</text:p>
          </table:table-cell>
          <table:table-cell office:value-type="float" office:value="15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4</text:p>
          </table:table-cell>
          <table:table-cell/>
          <table:table-cell/>
          <table:table-cell/>
          <table:table-cell office:value-type="string">
            <text:p>2024-01-15</text:p>
          </table:table-cell>
          <table:table-cell office:value-type="float" office:value="2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5</text:p>
          </table:table-cell>
          <table:table-cell/>
          <table:table-cell/>
          <table:table-cell/>
          <table:table-cell office:value-type="string">
            <text:p>2024-06-15</text:p>
          </table:table-cell>
          <table:table-cell office:value-type="float" office:value="25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number-columns-spanned="19">
            <text:p>[matplotlib_raw]</text:p>
          </table:table-cell>
        </table:table-row>
        <table:table-row>
          <table:table-cell office:value-type="string">
            <text:p>matplotlib_multi_figure</text:p>
          </table:table-cell>
          <table:table-cell office:value-type="string">
            <text:p>viz</text:p>
          </table:table-cell>
          <table:table-cell office:value-type="string">
            <text:p>matplotlib_raw</text:p>
          </table:table-cell>
          <table:table-cell office:value-type="string">
            <text:p>Raw matplotlib via =PYTHON() — multiple open figures merge verticall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Chart image in cell (merged figures)</text:p>
          </table:table-cell>
          <table:table-cell office:value-type="formula" table:formula="of:=PYTHON(&quot;import matplotlib.pyplot as plt; plt.plot([1, 2, 3]); plt.plot([3, 2, 1])&quot;)"/>
          <table:table-cell office:value-type="string">
            <text:p>N/A — inline =PYTHON() matplotlib</text:p>
          </table:table-cell>
          <table:table-cell/>
          <table:table-cell office:value-type="string">
            <text:p>Phase A viz pipeline; lists/dicts of figures use __wa_payload__: image envelope</text:p>
          </table:table-cell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math">
        <table:table-row>
          <table:table-cell office:value-type="string">
            <text:p>test_id</text:p>
          </table:table-cell>
          <table:table-cell office:value-type="string">
            <text:p>domain</text:p>
          </table:table-cell>
          <table:table-cell office:value-type="string">
            <text:p>helper</text:p>
          </table:table-cell>
          <table:table-cell office:value-type="string">
            <text:p>description</text:p>
          </table:table-cell>
          <table:table-cell office:value-type="string">
            <text:p>col_1</text:p>
          </table:table-cell>
          <table:table-cell office:value-type="string">
            <text:p>col_2</text:p>
          </table:table-cell>
          <table:table-cell office:value-type="string">
            <text:p>col_3</text:p>
          </table:table-cell>
          <table:table-cell office:value-type="string">
            <text:p>col_4</text:p>
          </table:table-cell>
          <table:table-cell office:value-type="string">
            <text:p>col_5</text:p>
          </table:table-cell>
          <table:table-cell office:value-type="string">
            <text:p>col_6</text:p>
          </table:table-cell>
          <table:table-cell office:value-type="string">
            <text:p>col_7</text:p>
          </table:table-cell>
          <table:table-cell office:value-type="string">
            <text:p>col_8</text:p>
          </table:table-cell>
          <table:table-cell office:value-type="string">
            <text:p>col_9</text:p>
          </table:table-cell>
          <table:table-cell office:value-type="string">
            <text:p>params</text:p>
          </table:table-cell>
          <table:table-cell office:value-type="string">
            <text:p>expected_scalar</text:p>
          </table:table-cell>
          <table:table-cell office:value-type="string">
            <text:p>python_formula</text:p>
          </table:table-cell>
          <table:table-cell office:value-type="string">
            <text:p>script_hint</text:p>
          </table:table-cell>
          <table:table-cell office:value-type="string">
            <text:p>chat_prompt</text:p>
          </table:table-cell>
          <table:table-cell office:value-type="string">
            <text:p>notes</text:p>
          </table:table-cell>
        </table:table-row>
        <table:table-row>
          <table:table-cell office:value-type="string" table:number-columns-spanned="19">
            <text:p>[math]</text:p>
          </table:table-cell>
        </table:table-row>
        <table:table-row>
          <table:table-cell office:value-type="string">
            <text:p>solve_equation</text:p>
          </table:table-cell>
          <table:table-cell office:value-type="string">
            <text:p>math</text:p>
          </table:table-cell>
          <table:table-cell office:value-type="string">
            <text:p>solve_equation</text:p>
          </table:table-cell>
          <table:table-cell office:value-type="string">
            <text:p>Solve equation for variable (SymPy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equation":"x**2 - 4","variable":"x"}</text:p>
          </table:table-cell>
          <table:table-cell office:value-type="string">
            <text:p>ok (2 solutions in full report)</text:p>
          </table:table-cell>
          <table:table-cell office:value-type="formula" table:formula="of:=PYTHON(&quot;from writeragent.scripting.symbolic import run_symbolic; run_symbolic({&quot;&quot;helper&quot;&quot;:&quot;&quot;solve_equation&quot;&quot;,&quot;&quot;params&quot;&quot;:{&quot;&quot;equation&quot;&quot;:&quot;&quot;x**2 - 4&quot;&quot;,&quot;&quot;variable&quot;&quot;:&quot;&quot;x&quot;&quot;}}, None, {})[&quot;&quot;status&quot;&quot;]&quot;)"/>
          <table:table-cell office:value-type="string">
            <text:p>Math Helpers → [Math] solve_equation</text:p>
          </table:table-cell>
          <table:table-cell office:value-type="string">
            <text:p>symbolic_math helper=solve_equation params={"equation":"x**2 - 4","variable":"x"}</text:p>
          </table:table-cell>
          <table:table-cell office:value-type="string">
            <text:p>RPS inserts Calc grid or Writer LO Math object; requires: sympy; check_mode: scalar</text:p>
          </table:table-cell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ymbolic_simplify</text:p>
          </table:table-cell>
          <table:table-cell office:value-type="string">
            <text:p>math</text:p>
          </table:table-cell>
          <table:table-cell office:value-type="string">
            <text:p>symbolic_simplify</text:p>
          </table:table-cell>
          <table:table-cell office:value-type="string">
            <text:p>Simplify symbolic express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expression":"(x + 1)**2 - x**2 - 2*x"}</text:p>
          </table:table-cell>
          <table:table-cell office:value-type="string">
            <text:p>1</text:p>
          </table:table-cell>
          <table:table-cell office:value-type="formula" table:formula="of:=PYTHON(&quot;from writeragent.scripting.symbolic import run_symbolic; run_symbolic({&quot;&quot;helper&quot;&quot;:&quot;&quot;symbolic_simplify&quot;&quot;,&quot;&quot;params&quot;&quot;:{&quot;&quot;expression&quot;&quot;:&quot;&quot;(x + 1)**2 - x**2 - 2*x&quot;&quot;}}, None, {})[&quot;&quot;text&quot;&quot;]&quot;)"/>
          <table:table-cell office:value-type="string">
            <text:p>Math Helpers → [Math] symbolic_simplify</text:p>
          </table:table-cell>
          <table:table-cell office:value-type="string">
            <text:p>symbolic_math helper=symbolic_simplify params={"expression":"(x + 1)**2 - x**2 - 2*x"}</text:p>
          </table:table-cell>
          <table:table-cell office:value-type="string">
            <text:p>requires: sympy; check_mode: scalar</text:p>
          </table:table-cell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integrate</text:p>
          </table:table-cell>
          <table:table-cell office:value-type="string">
            <text:p>math</text:p>
          </table:table-cell>
          <table:table-cell office:value-type="string">
            <text:p>integrate</text:p>
          </table:table-cell>
          <table:table-cell office:value-type="string">
            <text:p>Symbolic integra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expression":"sin(x)","variable":"x"}</text:p>
          </table:table-cell>
          <table:table-cell office:value-type="string">
            <text:p>ok (latex contains cos term)</text:p>
          </table:table-cell>
          <table:table-cell office:value-type="formula" table:formula="of:=PYTHON(&quot;from writeragent.scripting.symbolic import run_symbolic; run_symbolic({&quot;&quot;helper&quot;&quot;:&quot;&quot;integrate&quot;&quot;,&quot;&quot;params&quot;&quot;:{&quot;&quot;expression&quot;&quot;:&quot;&quot;sin(x)&quot;&quot;,&quot;&quot;variable&quot;&quot;:&quot;&quot;x&quot;&quot;}}, None, {})[&quot;&quot;status&quot;&quot;]&quot;)"/>
          <table:table-cell office:value-type="string">
            <text:p>Math Helpers → [Math] integrate</text:p>
          </table:table-cell>
          <table:table-cell office:value-type="string">
            <text:p>symbolic_math helper=integrate params={"expression":"sin(x)","variable":"x"}</text:p>
          </table:table-cell>
          <table:table-cell office:value-type="string">
            <text:p>requires: sympy; check_mode: scalar</text:p>
          </table:table-cell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fferentiate</text:p>
          </table:table-cell>
          <table:table-cell office:value-type="string">
            <text:p>math</text:p>
          </table:table-cell>
          <table:table-cell office:value-type="string">
            <text:p>differentiate</text:p>
          </table:table-cell>
          <table:table-cell office:value-type="string">
            <text:p>Symbolic derivative (no shipped RPS template — use header in note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expression":"x**2","variable":"x"}</text:p>
          </table:table-cell>
          <table:table-cell office:value-type="string">
            <text:p>2*x</text:p>
          </table:table-cell>
          <table:table-cell office:value-type="formula" table:formula="of:=PYTHON(&quot;from writeragent.scripting.symbolic import run_symbolic; run_symbolic({&quot;&quot;helper&quot;&quot;:&quot;&quot;differentiate&quot;&quot;,&quot;&quot;params&quot;&quot;:{&quot;&quot;expression&quot;&quot;:&quot;&quot;x**2&quot;&quot;,&quot;&quot;variable&quot;&quot;:&quot;&quot;x&quot;&quot;}}, None, {})[&quot;&quot;text&quot;&quot;]&quot;)"/>
          <table:table-cell office:value-type="string">
            <text:p>Math Helpers (custom) — # writeragent:math helper=differentiate</text:p>
          </table:table-cell>
          <table:table-cell office:value-type="string">
            <text:p>symbolic_math helper=differentiate params={"expression":"x**2","variable":"x"}</text:p>
          </table:table-cell>
          <table:table-cell office:value-type="string">
            <text:p>Copy template header: # writeragent:math helper=differentiate params={"expression":"x**2","variable":"x"}; requires: sympy; check_mode: scalar</text:p>
          </table:table-cell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quant">
        <table:table-row>
          <table:table-cell office:value-type="string">
            <text:p>test_id</text:p>
          </table:table-cell>
          <table:table-cell office:value-type="string">
            <text:p>domain</text:p>
          </table:table-cell>
          <table:table-cell office:value-type="string">
            <text:p>helper</text:p>
          </table:table-cell>
          <table:table-cell office:value-type="string">
            <text:p>description</text:p>
          </table:table-cell>
          <table:table-cell office:value-type="string">
            <text:p>col_1</text:p>
          </table:table-cell>
          <table:table-cell office:value-type="string">
            <text:p>col_2</text:p>
          </table:table-cell>
          <table:table-cell office:value-type="string">
            <text:p>col_3</text:p>
          </table:table-cell>
          <table:table-cell office:value-type="string">
            <text:p>col_4</text:p>
          </table:table-cell>
          <table:table-cell office:value-type="string">
            <text:p>col_5</text:p>
          </table:table-cell>
          <table:table-cell office:value-type="string">
            <text:p>col_6</text:p>
          </table:table-cell>
          <table:table-cell office:value-type="string">
            <text:p>col_7</text:p>
          </table:table-cell>
          <table:table-cell office:value-type="string">
            <text:p>col_8</text:p>
          </table:table-cell>
          <table:table-cell office:value-type="string">
            <text:p>col_9</text:p>
          </table:table-cell>
          <table:table-cell office:value-type="string">
            <text:p>params</text:p>
          </table:table-cell>
          <table:table-cell office:value-type="string">
            <text:p>expected_scalar</text:p>
          </table:table-cell>
          <table:table-cell office:value-type="string">
            <text:p>python_formula</text:p>
          </table:table-cell>
          <table:table-cell office:value-type="string">
            <text:p>script_hint</text:p>
          </table:table-cell>
          <table:table-cell office:value-type="string">
            <text:p>chat_prompt</text:p>
          </table:table-cell>
          <table:table-cell office:value-type="string">
            <text:p>notes</text:p>
          </table:table-cell>
        </table:table-row>
        <table:table-row>
          <table:table-cell office:value-type="string" table:number-columns-spanned="19">
            <text:p>[quant]</text:p>
          </table:table-cell>
        </table:table-row>
        <table:table-row>
          <table:table-cell office:value-type="string">
            <text:p>fetch_historical_data</text:p>
          </table:table-cell>
          <table:table-cell office:value-type="string">
            <text:p>quant</text:p>
          </table:table-cell>
          <table:table-cell office:value-type="string">
            <text:p>fetch_historical_data</text:p>
          </table:table-cell>
          <table:table-cell office:value-type="string">
            <text:p>Fetch OHLCV via yfinance (requires internet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tickers":["AAPL","MSFT"],"start_date":"2023-01-01","end_date":"2024-01-01","interval":"1d"}</text:p>
          </table:table-cell>
          <table:table-cell office:value-type="string">
            <text:p>ok (table rows &gt; 0)</text:p>
          </table:table-cell>
          <table:table-cell office:value-type="formula" table:formula="of:=PYTHON(&quot;from writeragent.scripting.quant import run_quant; run_quant({&quot;&quot;helper&quot;&quot;:&quot;&quot;fetch_historical_data&quot;&quot;,&quot;&quot;params&quot;&quot;:{&quot;&quot;tickers&quot;&quot;:[&quot;&quot;AAPL&quot;&quot;,&quot;&quot;MSFT&quot;&quot;],&quot;&quot;start_date&quot;&quot;:&quot;&quot;2023-01-01&quot;&quot;,&quot;&quot;end_date&quot;&quot;:&quot;&quot;2024-01-01&quot;&quot;,&quot;&quot;interval&quot;&quot;:&quot;&quot;1d&quot;&quot;}}, None, {})[&quot;&quot;status&quot;&quot;]&quot;)"/>
          <table:table-cell office:value-type="string">
            <text:p>Quant Helpers → [Quant] fetch_historical_data</text:p>
          </table:table-cell>
          <table:table-cell/>
          <table:table-cell office:value-type="string">
            <text:p>Skip when offline; uv pip install yfinance pandas-ta quantstats pyportfolioopt; requires: yfinance; requires: network; check_mode: scalar</text:p>
          </table:table-cell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chnical_analysis</text:p>
          </table:table-cell>
          <table:table-cell office:value-type="string">
            <text:p>quant</text:p>
          </table:table-cell>
          <table:table-cell office:value-type="string">
            <text:p>technical_analysis</text:p>
          </table:table-cell>
          <table:table-cell office:value-type="string">
            <text:p>MACD, RSI, Bollinger Bands on OHLCV gri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indicators":["macd","rsi","bbands"]}</text:p>
          </table:table-cell>
          <table:table-cell office:value-type="string">
            <text:p>ok</text:p>
          </table:table-cell>
          <table:table-cell office:value-type="formula" table:formula="of:=PYTHON(&quot;from writeragent.scripting.quant import run_quant; run_quant({&quot;&quot;helper&quot;&quot;:&quot;&quot;technical_analysis&quot;&quot;,&quot;&quot;params&quot;&quot;:{&quot;&quot;indicators&quot;&quot;:[&quot;&quot;macd&quot;&quot;,&quot;&quot;rsi&quot;&quot;,&quot;&quot;bbands&quot;&quot;]}}, data, {})[&quot;&quot;status&quot;&quot;]&quot;;E6:J26)"/>
          <table:table-cell office:value-type="string">
            <text:p>Quant Helpers → [Quant] technical_analysis</text:p>
          </table:table-cell>
          <table:table-cell/>
          <table:table-cell office:value-type="string">
            <text:p>requires: pandas_ta; check_mode: scalar</text:p>
          </table:table-cell>
        </table:table-row>
        <table:table-row>
          <table:table-cell office:value-type="string">
            <text:p>row_1</text:p>
          </table:table-cell>
          <table:table-cell/>
          <table:table-cell/>
          <table:table-cell/>
          <table:table-cell office:value-type="string">
            <text:p>Date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Volum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</text:p>
          </table:table-cell>
          <table:table-cell/>
          <table:table-cell/>
          <table:table-cell/>
          <table:table-cell office:value-type="string">
            <text:p>2024-01-01</text:p>
          </table:table-cell>
          <table:table-cell office:value-type="float" office:value="100.1"/>
          <table:table-cell office:value-type="float" office:value="101.6"/>
          <table:table-cell office:value-type="float" office:value="99.1"/>
          <table:table-cell office:value-type="float" office:value="100.6"/>
          <table:table-cell office:value-type="float" office:value="10100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</text:p>
          </table:table-cell>
          <table:table-cell/>
          <table:table-cell/>
          <table:table-cell/>
          <table:table-cell office:value-type="string">
            <text:p>2024-01-02</text:p>
          </table:table-cell>
          <table:table-cell office:value-type="float" office:value="100.2"/>
          <table:table-cell office:value-type="float" office:value="101.7"/>
          <table:table-cell office:value-type="float" office:value="99.2"/>
          <table:table-cell office:value-type="float" office:value="100.7"/>
          <table:table-cell office:value-type="float" office:value="10200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4</text:p>
          </table:table-cell>
          <table:table-cell/>
          <table:table-cell/>
          <table:table-cell/>
          <table:table-cell office:value-type="string">
            <text:p>2024-01-03</text:p>
          </table:table-cell>
          <table:table-cell office:value-type="float" office:value="100.3"/>
          <table:table-cell office:value-type="float" office:value="101.8"/>
          <table:table-cell office:value-type="float" office:value="99.3"/>
          <table:table-cell office:value-type="float" office:value="100.8"/>
          <table:table-cell office:value-type="float" office:value="10300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5</text:p>
          </table:table-cell>
          <table:table-cell/>
          <table:table-cell/>
          <table:table-cell/>
          <table:table-cell office:value-type="string">
            <text:p>2024-01-04</text:p>
          </table:table-cell>
          <table:table-cell office:value-type="float" office:value="100.4"/>
          <table:table-cell office:value-type="float" office:value="101.9"/>
          <table:table-cell office:value-type="float" office:value="99.4"/>
          <table:table-cell office:value-type="float" office:value="100.9"/>
          <table:table-cell office:value-type="float" office:value="10400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6</text:p>
          </table:table-cell>
          <table:table-cell/>
          <table:table-cell/>
          <table:table-cell/>
          <table:table-cell office:value-type="string">
            <text:p>2024-01-05</text:p>
          </table:table-cell>
          <table:table-cell office:value-type="float" office:value="100.5"/>
          <table:table-cell office:value-type="float" office:value="102.0"/>
          <table:table-cell office:value-type="float" office:value="99.5"/>
          <table:table-cell office:value-type="float" office:value="101.0"/>
          <table:table-cell office:value-type="float" office:value="10500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7</text:p>
          </table:table-cell>
          <table:table-cell/>
          <table:table-cell/>
          <table:table-cell/>
          <table:table-cell office:value-type="string">
            <text:p>2024-01-06</text:p>
          </table:table-cell>
          <table:table-cell office:value-type="float" office:value="100.6"/>
          <table:table-cell office:value-type="float" office:value="102.1"/>
          <table:table-cell office:value-type="float" office:value="99.6"/>
          <table:table-cell office:value-type="float" office:value="101.1"/>
          <table:table-cell office:value-type="float" office:value="10600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8</text:p>
          </table:table-cell>
          <table:table-cell/>
          <table:table-cell/>
          <table:table-cell/>
          <table:table-cell office:value-type="string">
            <text:p>2024-01-07</text:p>
          </table:table-cell>
          <table:table-cell office:value-type="float" office:value="100.7"/>
          <table:table-cell office:value-type="float" office:value="102.2"/>
          <table:table-cell office:value-type="float" office:value="99.7"/>
          <table:table-cell office:value-type="float" office:value="101.2"/>
          <table:table-cell office:value-type="float" office:value="10700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9</text:p>
          </table:table-cell>
          <table:table-cell/>
          <table:table-cell/>
          <table:table-cell/>
          <table:table-cell office:value-type="string">
            <text:p>2024-01-08</text:p>
          </table:table-cell>
          <table:table-cell office:value-type="float" office:value="100.8"/>
          <table:table-cell office:value-type="float" office:value="102.3"/>
          <table:table-cell office:value-type="float" office:value="99.8"/>
          <table:table-cell office:value-type="float" office:value="101.3"/>
          <table:table-cell office:value-type="float" office:value="10800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0</text:p>
          </table:table-cell>
          <table:table-cell/>
          <table:table-cell/>
          <table:table-cell/>
          <table:table-cell office:value-type="string">
            <text:p>2024-01-09</text:p>
          </table:table-cell>
          <table:table-cell office:value-type="float" office:value="100.9"/>
          <table:table-cell office:value-type="float" office:value="102.4"/>
          <table:table-cell office:value-type="float" office:value="99.9"/>
          <table:table-cell office:value-type="float" office:value="101.4"/>
          <table:table-cell office:value-type="float" office:value="10900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1</text:p>
          </table:table-cell>
          <table:table-cell/>
          <table:table-cell/>
          <table:table-cell/>
          <table:table-cell office:value-type="string">
            <text:p>2024-01-10</text:p>
          </table:table-cell>
          <table:table-cell office:value-type="float" office:value="101.0"/>
          <table:table-cell office:value-type="float" office:value="102.5"/>
          <table:table-cell office:value-type="float" office:value="100.0"/>
          <table:table-cell office:value-type="float" office:value="101.5"/>
          <table:table-cell office:value-type="float" office:value="11000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2</text:p>
          </table:table-cell>
          <table:table-cell/>
          <table:table-cell/>
          <table:table-cell/>
          <table:table-cell office:value-type="string">
            <text:p>2024-01-11</text:p>
          </table:table-cell>
          <table:table-cell office:value-type="float" office:value="101.1"/>
          <table:table-cell office:value-type="float" office:value="102.6"/>
          <table:table-cell office:value-type="float" office:value="100.1"/>
          <table:table-cell office:value-type="float" office:value="101.6"/>
          <table:table-cell office:value-type="float" office:value="11100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3</text:p>
          </table:table-cell>
          <table:table-cell/>
          <table:table-cell/>
          <table:table-cell/>
          <table:table-cell office:value-type="string">
            <text:p>2024-01-12</text:p>
          </table:table-cell>
          <table:table-cell office:value-type="float" office:value="101.2"/>
          <table:table-cell office:value-type="float" office:value="102.7"/>
          <table:table-cell office:value-type="float" office:value="100.2"/>
          <table:table-cell office:value-type="float" office:value="101.7"/>
          <table:table-cell office:value-type="float" office:value="11200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4</text:p>
          </table:table-cell>
          <table:table-cell/>
          <table:table-cell/>
          <table:table-cell/>
          <table:table-cell office:value-type="string">
            <text:p>2024-01-13</text:p>
          </table:table-cell>
          <table:table-cell office:value-type="float" office:value="101.3"/>
          <table:table-cell office:value-type="float" office:value="102.8"/>
          <table:table-cell office:value-type="float" office:value="100.3"/>
          <table:table-cell office:value-type="float" office:value="101.8"/>
          <table:table-cell office:value-type="float" office:value="11300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5</text:p>
          </table:table-cell>
          <table:table-cell/>
          <table:table-cell/>
          <table:table-cell/>
          <table:table-cell office:value-type="string">
            <text:p>2024-01-14</text:p>
          </table:table-cell>
          <table:table-cell office:value-type="float" office:value="101.4"/>
          <table:table-cell office:value-type="float" office:value="102.9"/>
          <table:table-cell office:value-type="float" office:value="100.4"/>
          <table:table-cell office:value-type="float" office:value="101.9"/>
          <table:table-cell office:value-type="float" office:value="11400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6</text:p>
          </table:table-cell>
          <table:table-cell/>
          <table:table-cell/>
          <table:table-cell/>
          <table:table-cell office:value-type="string">
            <text:p>2024-01-15</text:p>
          </table:table-cell>
          <table:table-cell office:value-type="float" office:value="101.5"/>
          <table:table-cell office:value-type="float" office:value="103.0"/>
          <table:table-cell office:value-type="float" office:value="100.5"/>
          <table:table-cell office:value-type="float" office:value="102.0"/>
          <table:table-cell office:value-type="float" office:value="11500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7</text:p>
          </table:table-cell>
          <table:table-cell/>
          <table:table-cell/>
          <table:table-cell/>
          <table:table-cell office:value-type="string">
            <text:p>2024-01-16</text:p>
          </table:table-cell>
          <table:table-cell office:value-type="float" office:value="101.6"/>
          <table:table-cell office:value-type="float" office:value="103.1"/>
          <table:table-cell office:value-type="float" office:value="100.6"/>
          <table:table-cell office:value-type="float" office:value="102.1"/>
          <table:table-cell office:value-type="float" office:value="11600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8</text:p>
          </table:table-cell>
          <table:table-cell/>
          <table:table-cell/>
          <table:table-cell/>
          <table:table-cell office:value-type="string">
            <text:p>2024-01-17</text:p>
          </table:table-cell>
          <table:table-cell office:value-type="float" office:value="101.7"/>
          <table:table-cell office:value-type="float" office:value="103.2"/>
          <table:table-cell office:value-type="float" office:value="100.7"/>
          <table:table-cell office:value-type="float" office:value="102.2"/>
          <table:table-cell office:value-type="float" office:value="11700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9</text:p>
          </table:table-cell>
          <table:table-cell/>
          <table:table-cell/>
          <table:table-cell/>
          <table:table-cell office:value-type="string">
            <text:p>2024-01-18</text:p>
          </table:table-cell>
          <table:table-cell office:value-type="float" office:value="101.8"/>
          <table:table-cell office:value-type="float" office:value="103.3"/>
          <table:table-cell office:value-type="float" office:value="100.8"/>
          <table:table-cell office:value-type="float" office:value="102.3"/>
          <table:table-cell office:value-type="float" office:value="11800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0</text:p>
          </table:table-cell>
          <table:table-cell/>
          <table:table-cell/>
          <table:table-cell/>
          <table:table-cell office:value-type="string">
            <text:p>2024-01-19</text:p>
          </table:table-cell>
          <table:table-cell office:value-type="float" office:value="101.9"/>
          <table:table-cell office:value-type="float" office:value="103.4"/>
          <table:table-cell office:value-type="float" office:value="100.9"/>
          <table:table-cell office:value-type="float" office:value="102.4"/>
          <table:table-cell office:value-type="float" office:value="11900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1</text:p>
          </table:table-cell>
          <table:table-cell/>
          <table:table-cell/>
          <table:table-cell/>
          <table:table-cell office:value-type="string">
            <text:p>2024-01-20</text:p>
          </table:table-cell>
          <table:table-cell office:value-type="float" office:value="102.0"/>
          <table:table-cell office:value-type="float" office:value="103.5"/>
          <table:table-cell office:value-type="float" office:value="101.0"/>
          <table:table-cell office:value-type="float" office:value="102.5"/>
          <table:table-cell office:value-type="float" office:value="12000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ortfolio_tearsheet</text:p>
          </table:table-cell>
          <table:table-cell office:value-type="string">
            <text:p>quant</text:p>
          </table:table-cell>
          <table:table-cell office:value-type="string">
            <text:p>portfolio_tearsheet</text:p>
          </table:table-cell>
          <table:table-cell office:value-type="string">
            <text:p>Portfolio performance metrics via quantstat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}</text:p>
          </table:table-cell>
          <table:table-cell office:value-type="string">
            <text:p>ok (metrics + tables)</text:p>
          </table:table-cell>
          <table:table-cell office:value-type="formula" table:formula="of:=PYTHON(&quot;from writeragent.scripting.quant import run_quant; run_quant({&quot;&quot;helper&quot;&quot;:&quot;&quot;portfolio_tearsheet&quot;&quot;,&quot;&quot;params&quot;&quot;:{}}, data, {})[&quot;&quot;status&quot;&quot;]&quot;;E29:G39)"/>
          <table:table-cell office:value-type="string">
            <text:p>Quant Helpers → [Quant] portfolio_tearsheet</text:p>
          </table:table-cell>
          <table:table-cell/>
          <table:table-cell office:value-type="string">
            <text:p>requires: quantstats; check_mode: scalar</text:p>
          </table:table-cell>
        </table:table-row>
        <table:table-row>
          <table:table-cell office:value-type="string">
            <text:p>row_1</text:p>
          </table:table-cell>
          <table:table-cell/>
          <table:table-cell/>
          <table:table-cell/>
          <table:table-cell office:value-type="string">
            <text:p>AAPL</text:p>
          </table:table-cell>
          <table:table-cell office:value-type="string">
            <text:p>MSFT</text:p>
          </table:table-cell>
          <table:table-cell office:value-type="string">
            <text:p>GOOG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</text:p>
          </table:table-cell>
          <table:table-cell/>
          <table:table-cell/>
          <table:table-cell/>
          <table:table-cell office:value-type="float" office:value="0.01"/>
          <table:table-cell office:value-type="float" office:value="0.008"/>
          <table:table-cell office:value-type="float" office:value="0.0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</text:p>
          </table:table-cell>
          <table:table-cell/>
          <table:table-cell/>
          <table:table-cell/>
          <table:table-cell office:value-type="float" office:value="0.02"/>
          <table:table-cell office:value-type="float" office:value="-0.01"/>
          <table:table-cell office:value-type="float" office:value="0.0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4</text:p>
          </table:table-cell>
          <table:table-cell/>
          <table:table-cell/>
          <table:table-cell/>
          <table:table-cell office:value-type="float" office:value="-0.005"/>
          <table:table-cell office:value-type="float" office:value="0.015"/>
          <table:table-cell office:value-type="float" office:value="0.0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5</text:p>
          </table:table-cell>
          <table:table-cell/>
          <table:table-cell/>
          <table:table-cell/>
          <table:table-cell office:value-type="float" office:value="0.012"/>
          <table:table-cell office:value-type="float" office:value="0.005"/>
          <table:table-cell office:value-type="float" office:value="-0.00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6</text:p>
          </table:table-cell>
          <table:table-cell/>
          <table:table-cell/>
          <table:table-cell/>
          <table:table-cell office:value-type="float" office:value="0.008"/>
          <table:table-cell office:value-type="float" office:value="0.02"/>
          <table:table-cell office:value-type="float" office:value="0.0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7</text:p>
          </table:table-cell>
          <table:table-cell/>
          <table:table-cell/>
          <table:table-cell/>
          <table:table-cell office:value-type="float" office:value="0.015"/>
          <table:table-cell office:value-type="float" office:value="-0.005"/>
          <table:table-cell office:value-type="float" office:value="0.0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8</text:p>
          </table:table-cell>
          <table:table-cell/>
          <table:table-cell/>
          <table:table-cell/>
          <table:table-cell office:value-type="float" office:value="-0.01"/>
          <table:table-cell office:value-type="float" office:value="0.012"/>
          <table:table-cell office:value-type="float" office:value="0.00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9</text:p>
          </table:table-cell>
          <table:table-cell/>
          <table:table-cell/>
          <table:table-cell/>
          <table:table-cell office:value-type="float" office:value="0.02"/>
          <table:table-cell office:value-type="float" office:value="0.008"/>
          <table:table-cell office:value-type="float" office:value="0.0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0</text:p>
          </table:table-cell>
          <table:table-cell/>
          <table:table-cell/>
          <table:table-cell/>
          <table:table-cell office:value-type="float" office:value="0.005"/>
          <table:table-cell office:value-type="float" office:value="0.015"/>
          <table:table-cell office:value-type="float" office:value="-0.00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1</text:p>
          </table:table-cell>
          <table:table-cell/>
          <table:table-cell/>
          <table:table-cell/>
          <table:table-cell office:value-type="float" office:value="0.01"/>
          <table:table-cell office:value-type="float" office:value="0.01"/>
          <table:table-cell office:value-type="float" office:value="0.0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efficient_frontier</text:p>
          </table:table-cell>
          <table:table-cell office:value-type="string">
            <text:p>quant</text:p>
          </table:table-cell>
          <table:table-cell office:value-type="string">
            <text:p>efficient_frontier</text:p>
          </table:table-cell>
          <table:table-cell office:value-type="string">
            <text:p>Mean-variance frontier via PyPortfolioOp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}</text:p>
          </table:table-cell>
          <table:table-cell office:value-type="string">
            <text:p>ok (weights table)</text:p>
          </table:table-cell>
          <table:table-cell office:value-type="formula" table:formula="of:=PYTHON(&quot;from writeragent.scripting.quant import run_quant; run_quant({&quot;&quot;helper&quot;&quot;:&quot;&quot;efficient_frontier&quot;&quot;,&quot;&quot;params&quot;&quot;:{}}, data, {})[&quot;&quot;status&quot;&quot;]&quot;;E42:G52)"/>
          <table:table-cell office:value-type="string">
            <text:p>Quant Helpers → [Quant] efficient_frontier</text:p>
          </table:table-cell>
          <table:table-cell/>
          <table:table-cell office:value-type="string">
            <text:p>requires: pypfopt; check_mode: scalar</text:p>
          </table:table-cell>
        </table:table-row>
        <table:table-row>
          <table:table-cell office:value-type="string">
            <text:p>row_1</text:p>
          </table:table-cell>
          <table:table-cell/>
          <table:table-cell/>
          <table:table-cell/>
          <table:table-cell office:value-type="string">
            <text:p>AAPL</text:p>
          </table:table-cell>
          <table:table-cell office:value-type="string">
            <text:p>MSFT</text:p>
          </table:table-cell>
          <table:table-cell office:value-type="string">
            <text:p>GOOG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</text:p>
          </table:table-cell>
          <table:table-cell/>
          <table:table-cell/>
          <table:table-cell/>
          <table:table-cell office:value-type="float" office:value="0.01"/>
          <table:table-cell office:value-type="float" office:value="0.008"/>
          <table:table-cell office:value-type="float" office:value="0.0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</text:p>
          </table:table-cell>
          <table:table-cell/>
          <table:table-cell/>
          <table:table-cell/>
          <table:table-cell office:value-type="float" office:value="0.02"/>
          <table:table-cell office:value-type="float" office:value="-0.01"/>
          <table:table-cell office:value-type="float" office:value="0.0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4</text:p>
          </table:table-cell>
          <table:table-cell/>
          <table:table-cell/>
          <table:table-cell/>
          <table:table-cell office:value-type="float" office:value="-0.005"/>
          <table:table-cell office:value-type="float" office:value="0.015"/>
          <table:table-cell office:value-type="float" office:value="0.0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5</text:p>
          </table:table-cell>
          <table:table-cell/>
          <table:table-cell/>
          <table:table-cell/>
          <table:table-cell office:value-type="float" office:value="0.012"/>
          <table:table-cell office:value-type="float" office:value="0.005"/>
          <table:table-cell office:value-type="float" office:value="-0.00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6</text:p>
          </table:table-cell>
          <table:table-cell/>
          <table:table-cell/>
          <table:table-cell/>
          <table:table-cell office:value-type="float" office:value="0.008"/>
          <table:table-cell office:value-type="float" office:value="0.02"/>
          <table:table-cell office:value-type="float" office:value="0.0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7</text:p>
          </table:table-cell>
          <table:table-cell/>
          <table:table-cell/>
          <table:table-cell/>
          <table:table-cell office:value-type="float" office:value="0.015"/>
          <table:table-cell office:value-type="float" office:value="-0.005"/>
          <table:table-cell office:value-type="float" office:value="0.0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8</text:p>
          </table:table-cell>
          <table:table-cell/>
          <table:table-cell/>
          <table:table-cell/>
          <table:table-cell office:value-type="float" office:value="-0.01"/>
          <table:table-cell office:value-type="float" office:value="0.012"/>
          <table:table-cell office:value-type="float" office:value="0.00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9</text:p>
          </table:table-cell>
          <table:table-cell/>
          <table:table-cell/>
          <table:table-cell/>
          <table:table-cell office:value-type="float" office:value="0.02"/>
          <table:table-cell office:value-type="float" office:value="0.008"/>
          <table:table-cell office:value-type="float" office:value="0.0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0</text:p>
          </table:table-cell>
          <table:table-cell/>
          <table:table-cell/>
          <table:table-cell/>
          <table:table-cell office:value-type="float" office:value="0.005"/>
          <table:table-cell office:value-type="float" office:value="0.015"/>
          <table:table-cell office:value-type="float" office:value="-0.00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1</text:p>
          </table:table-cell>
          <table:table-cell/>
          <table:table-cell/>
          <table:table-cell/>
          <table:table-cell office:value-type="float" office:value="0.01"/>
          <table:table-cell office:value-type="float" office:value="0.01"/>
          <table:table-cell office:value-type="float" office:value="0.0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optimize">
        <table:table-row>
          <table:table-cell office:value-type="string">
            <text:p>test_id</text:p>
          </table:table-cell>
          <table:table-cell office:value-type="string">
            <text:p>domain</text:p>
          </table:table-cell>
          <table:table-cell office:value-type="string">
            <text:p>helper</text:p>
          </table:table-cell>
          <table:table-cell office:value-type="string">
            <text:p>description</text:p>
          </table:table-cell>
          <table:table-cell office:value-type="string">
            <text:p>col_1</text:p>
          </table:table-cell>
          <table:table-cell office:value-type="string">
            <text:p>col_2</text:p>
          </table:table-cell>
          <table:table-cell office:value-type="string">
            <text:p>col_3</text:p>
          </table:table-cell>
          <table:table-cell office:value-type="string">
            <text:p>col_4</text:p>
          </table:table-cell>
          <table:table-cell office:value-type="string">
            <text:p>col_5</text:p>
          </table:table-cell>
          <table:table-cell office:value-type="string">
            <text:p>col_6</text:p>
          </table:table-cell>
          <table:table-cell office:value-type="string">
            <text:p>col_7</text:p>
          </table:table-cell>
          <table:table-cell office:value-type="string">
            <text:p>col_8</text:p>
          </table:table-cell>
          <table:table-cell office:value-type="string">
            <text:p>col_9</text:p>
          </table:table-cell>
          <table:table-cell office:value-type="string">
            <text:p>params</text:p>
          </table:table-cell>
          <table:table-cell office:value-type="string">
            <text:p>expected_scalar</text:p>
          </table:table-cell>
          <table:table-cell office:value-type="string">
            <text:p>python_formula</text:p>
          </table:table-cell>
          <table:table-cell office:value-type="string">
            <text:p>script_hint</text:p>
          </table:table-cell>
          <table:table-cell office:value-type="string">
            <text:p>chat_prompt</text:p>
          </table:table-cell>
          <table:table-cell office:value-type="string">
            <text:p>notes</text:p>
          </table:table-cell>
        </table:table-row>
        <table:table-row>
          <table:table-cell office:value-type="string" table:number-columns-spanned="19">
            <text:p>[optimize]</text:p>
          </table:table-cell>
        </table:table-row>
        <table:table-row>
          <table:table-cell office:value-type="string">
            <text:p>linear_programming</text:p>
          </table:table-cell>
          <table:table-cell office:value-type="string">
            <text:p>optimize</text:p>
          </table:table-cell>
          <table:table-cell office:value-type="string">
            <text:p>linear_programming</text:p>
          </table:table-cell>
          <table:table-cell office:value-type="string">
            <text:p>LP via scipy.optimize.linprog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c_col":"c","a_cols":["a1","a2"],"b_col":"b","maximize":true}</text:p>
          </table:table-cell>
          <table:table-cell office:value-type="string">
            <text:p>ok</text:p>
          </table:table-cell>
          <table:table-cell office:value-type="formula" table:formula="of:=PYTHON(&quot;from writeragent.scripting.optimize import run_optimize; run_optimize({&quot;&quot;helper&quot;&quot;:&quot;&quot;linear_programming&quot;&quot;,&quot;&quot;params&quot;&quot;:{&quot;&quot;c_col&quot;&quot;:&quot;&quot;c&quot;&quot;,&quot;&quot;a_cols&quot;&quot;:[&quot;&quot;a1&quot;&quot;,&quot;&quot;a2&quot;&quot;],&quot;&quot;b_col&quot;&quot;:&quot;&quot;b&quot;&quot;,&quot;&quot;maximize&quot;&quot;:true}}, data, {})[&quot;&quot;status&quot;&quot;]&quot;;E4:H6)"/>
          <table:table-cell office:value-type="string">
            <text:p>Optimize Helpers → [Optimize] linear_programming</text:p>
          </table:table-cell>
          <table:table-cell office:value-type="string">
            <text:p>optimize_data helper=linear_programming data_range=optimize.E4:H6 params={"c_col":"c","a_cols":["a1","a2"],"b_col":"b","maximize":true}</text:p>
          </table:table-cell>
          <table:table-cell office:value-type="string">
            <text:p>check_mode: scalar</text:p>
          </table:table-cell>
        </table:table-row>
        <table:table-row>
          <table:table-cell office:value-type="string">
            <text:p>row_1</text:p>
          </table:table-cell>
          <table:table-cell/>
          <table:table-cell/>
          <table:table-cell/>
          <table:table-cell office:value-type="string">
            <text:p>c</text:p>
          </table:table-cell>
          <table:table-cell office:value-type="string">
            <text:p>a1</text:p>
          </table:table-cell>
          <table:table-cell office:value-type="string">
            <text:p>a2</text:p>
          </table:table-cell>
          <table:table-cell office:value-type="string">
            <text:p>b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</text:p>
          </table:table-cell>
          <table:table-cell/>
          <table:table-cell/>
          <table:table-cell/>
          <table:table-cell office:value-type="float" office:value="3.0"/>
          <table:table-cell office:value-type="float" office:value="1.0"/>
          <table:table-cell office:value-type="float" office:value="1.0"/>
          <table:table-cell office:value-type="float" office:value="4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</text:p>
          </table:table-cell>
          <table:table-cell/>
          <table:table-cell/>
          <table:table-cell/>
          <table:table-cell office:value-type="float" office:value="2.0"/>
          <table:table-cell office:value-type="float" office:value="2.0"/>
          <table:table-cell office:value-type="float" office:value="1.0"/>
          <table:table-cell office:value-type="float" office:value="3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optimize_portfolio</text:p>
          </table:table-cell>
          <table:table-cell office:value-type="string">
            <text:p>optimize</text:p>
          </table:table-cell>
          <table:table-cell office:value-type="string">
            <text:p>optimize_portfolio</text:p>
          </table:table-cell>
          <table:table-cell office:value-type="string">
            <text:p>Mean-variance portfolio weight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returns_col":["AAPL","MSFT","GOOG"]}</text:p>
          </table:table-cell>
          <table:table-cell office:value-type="string">
            <text:p>ok</text:p>
          </table:table-cell>
          <table:table-cell office:value-type="formula" table:formula="of:=PYTHON(&quot;from writeragent.scripting.optimize import run_optimize; run_optimize({&quot;&quot;helper&quot;&quot;:&quot;&quot;optimize_portfolio&quot;&quot;,&quot;&quot;params&quot;&quot;:{&quot;&quot;returns_col&quot;&quot;:[&quot;&quot;AAPL&quot;&quot;,&quot;&quot;MSFT&quot;&quot;,&quot;&quot;GOOG&quot;&quot;]}}, data, {})[&quot;&quot;status&quot;&quot;]&quot;;E9:G19)"/>
          <table:table-cell office:value-type="string">
            <text:p>Optimize Helpers → [Optimize] optimize_portfolio</text:p>
          </table:table-cell>
          <table:table-cell office:value-type="string">
            <text:p>optimize_data helper=optimize_portfolio data_range=optimize.E9:G19 params={"returns_col":["AAPL","MSFT","GOOG"]}</text:p>
          </table:table-cell>
          <table:table-cell office:value-type="string">
            <text:p>check_mode: scalar</text:p>
          </table:table-cell>
        </table:table-row>
        <table:table-row>
          <table:table-cell office:value-type="string">
            <text:p>row_1</text:p>
          </table:table-cell>
          <table:table-cell/>
          <table:table-cell/>
          <table:table-cell/>
          <table:table-cell office:value-type="string">
            <text:p>AAPL</text:p>
          </table:table-cell>
          <table:table-cell office:value-type="string">
            <text:p>MSFT</text:p>
          </table:table-cell>
          <table:table-cell office:value-type="string">
            <text:p>GOOG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</text:p>
          </table:table-cell>
          <table:table-cell/>
          <table:table-cell/>
          <table:table-cell/>
          <table:table-cell office:value-type="float" office:value="0.01"/>
          <table:table-cell office:value-type="float" office:value="0.008"/>
          <table:table-cell office:value-type="float" office:value="0.0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</text:p>
          </table:table-cell>
          <table:table-cell/>
          <table:table-cell/>
          <table:table-cell/>
          <table:table-cell office:value-type="float" office:value="0.02"/>
          <table:table-cell office:value-type="float" office:value="-0.01"/>
          <table:table-cell office:value-type="float" office:value="0.0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4</text:p>
          </table:table-cell>
          <table:table-cell/>
          <table:table-cell/>
          <table:table-cell/>
          <table:table-cell office:value-type="float" office:value="-0.005"/>
          <table:table-cell office:value-type="float" office:value="0.015"/>
          <table:table-cell office:value-type="float" office:value="0.0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5</text:p>
          </table:table-cell>
          <table:table-cell/>
          <table:table-cell/>
          <table:table-cell/>
          <table:table-cell office:value-type="float" office:value="0.012"/>
          <table:table-cell office:value-type="float" office:value="0.005"/>
          <table:table-cell office:value-type="float" office:value="-0.00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6</text:p>
          </table:table-cell>
          <table:table-cell/>
          <table:table-cell/>
          <table:table-cell/>
          <table:table-cell office:value-type="float" office:value="0.008"/>
          <table:table-cell office:value-type="float" office:value="0.02"/>
          <table:table-cell office:value-type="float" office:value="0.0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7</text:p>
          </table:table-cell>
          <table:table-cell/>
          <table:table-cell/>
          <table:table-cell/>
          <table:table-cell office:value-type="float" office:value="0.015"/>
          <table:table-cell office:value-type="float" office:value="-0.005"/>
          <table:table-cell office:value-type="float" office:value="0.0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8</text:p>
          </table:table-cell>
          <table:table-cell/>
          <table:table-cell/>
          <table:table-cell/>
          <table:table-cell office:value-type="float" office:value="-0.01"/>
          <table:table-cell office:value-type="float" office:value="0.012"/>
          <table:table-cell office:value-type="float" office:value="0.00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9</text:p>
          </table:table-cell>
          <table:table-cell/>
          <table:table-cell/>
          <table:table-cell/>
          <table:table-cell office:value-type="float" office:value="0.02"/>
          <table:table-cell office:value-type="float" office:value="0.008"/>
          <table:table-cell office:value-type="float" office:value="0.0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0</text:p>
          </table:table-cell>
          <table:table-cell/>
          <table:table-cell/>
          <table:table-cell/>
          <table:table-cell office:value-type="float" office:value="0.005"/>
          <table:table-cell office:value-type="float" office:value="0.015"/>
          <table:table-cell office:value-type="float" office:value="-0.00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1</text:p>
          </table:table-cell>
          <table:table-cell/>
          <table:table-cell/>
          <table:table-cell/>
          <table:table-cell office:value-type="float" office:value="0.01"/>
          <table:table-cell office:value-type="float" office:value="0.01"/>
          <table:table-cell office:value-type="float" office:value="0.0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olve_scheduling_problem</text:p>
          </table:table-cell>
          <table:table-cell office:value-type="string">
            <text:p>optimize</text:p>
          </table:table-cell>
          <table:table-cell office:value-type="string">
            <text:p>solve_scheduling_problem</text:p>
          </table:table-cell>
          <table:table-cell office:value-type="string">
            <text:p>Assignment problem (Hungarian algorithm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cost_cols":["Task1","Task2","Task3"]}</text:p>
          </table:table-cell>
          <table:table-cell office:value-type="string">
            <text:p>6.0</text:p>
          </table:table-cell>
          <table:table-cell office:value-type="formula" table:formula="of:=PYTHON(&quot;from writeragent.scripting.optimize import run_optimize; run_optimize({&quot;&quot;helper&quot;&quot;:&quot;&quot;solve_scheduling_problem&quot;&quot;,&quot;&quot;params&quot;&quot;:{&quot;&quot;cost_cols&quot;&quot;:[&quot;&quot;Task1&quot;&quot;,&quot;&quot;Task2&quot;&quot;,&quot;&quot;Task3&quot;&quot;]}}, data, {})[&quot;&quot;metrics&quot;&quot;][&quot;&quot;total_cost&quot;&quot;]&quot;;E22:G25)"/>
          <table:table-cell office:value-type="string">
            <text:p>Optimize Helpers → [Optimize] solve_scheduling_problem</text:p>
          </table:table-cell>
          <table:table-cell office:value-type="string">
            <text:p>optimize_data helper=solve_scheduling_problem data_range=optimize.E22:G25 params={"cost_cols":["Task1","Task2","Task3"]}</text:p>
          </table:table-cell>
          <table:table-cell office:value-type="string">
            <text:p>check_mode: scalar</text:p>
          </table:table-cell>
        </table:table-row>
        <table:table-row>
          <table:table-cell office:value-type="string">
            <text:p>row_1</text:p>
          </table:table-cell>
          <table:table-cell/>
          <table:table-cell/>
          <table:table-cell/>
          <table:table-cell office:value-type="string">
            <text:p>Task1</text:p>
          </table:table-cell>
          <table:table-cell office:value-type="string">
            <text:p>Task2</text:p>
          </table:table-cell>
          <table:table-cell office:value-type="string">
            <text:p>Task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</text:p>
          </table:table-cell>
          <table:table-cell/>
          <table:table-cell/>
          <table:table-cell/>
          <table:table-cell office:value-type="float" office:value="4.0"/>
          <table:table-cell office:value-type="float" office:value="2.0"/>
          <table:table-cell office:value-type="float" office:value="8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</text:p>
          </table:table-cell>
          <table:table-cell/>
          <table:table-cell/>
          <table:table-cell/>
          <table:table-cell office:value-type="float" office:value="2.0"/>
          <table:table-cell office:value-type="float" office:value="3.0"/>
          <table:table-cell office:value-type="float" office:value="4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4</text:p>
          </table:table-cell>
          <table:table-cell/>
          <table:table-cell/>
          <table:table-cell/>
          <table:table-cell office:value-type="float" office:value="8.0"/>
          <table:table-cell office:value-type="float" office:value="1.0"/>
          <table:table-cell office:value-type="float" office:value="2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units">
        <table:table-row>
          <table:table-cell office:value-type="string">
            <text:p>test_id</text:p>
          </table:table-cell>
          <table:table-cell office:value-type="string">
            <text:p>domain</text:p>
          </table:table-cell>
          <table:table-cell office:value-type="string">
            <text:p>helper</text:p>
          </table:table-cell>
          <table:table-cell office:value-type="string">
            <text:p>description</text:p>
          </table:table-cell>
          <table:table-cell office:value-type="string">
            <text:p>col_1</text:p>
          </table:table-cell>
          <table:table-cell office:value-type="string">
            <text:p>col_2</text:p>
          </table:table-cell>
          <table:table-cell office:value-type="string">
            <text:p>col_3</text:p>
          </table:table-cell>
          <table:table-cell office:value-type="string">
            <text:p>col_4</text:p>
          </table:table-cell>
          <table:table-cell office:value-type="string">
            <text:p>col_5</text:p>
          </table:table-cell>
          <table:table-cell office:value-type="string">
            <text:p>col_6</text:p>
          </table:table-cell>
          <table:table-cell office:value-type="string">
            <text:p>col_7</text:p>
          </table:table-cell>
          <table:table-cell office:value-type="string">
            <text:p>col_8</text:p>
          </table:table-cell>
          <table:table-cell office:value-type="string">
            <text:p>col_9</text:p>
          </table:table-cell>
          <table:table-cell office:value-type="string">
            <text:p>params</text:p>
          </table:table-cell>
          <table:table-cell office:value-type="string">
            <text:p>expected_scalar</text:p>
          </table:table-cell>
          <table:table-cell office:value-type="string">
            <text:p>python_formula</text:p>
          </table:table-cell>
          <table:table-cell office:value-type="string">
            <text:p>script_hint</text:p>
          </table:table-cell>
          <table:table-cell office:value-type="string">
            <text:p>chat_prompt</text:p>
          </table:table-cell>
          <table:table-cell office:value-type="string">
            <text:p>notes</text:p>
          </table:table-cell>
        </table:table-row>
        <table:table-row>
          <table:table-cell office:value-type="string" table:number-columns-spanned="19">
            <text:p>[units]</text:p>
          </table:table-cell>
        </table:table-row>
        <table:table-row>
          <table:table-cell office:value-type="string">
            <text:p>convert_quantity</text:p>
          </table:table-cell>
          <table:table-cell office:value-type="string">
            <text:p>units</text:p>
          </table:table-cell>
          <table:table-cell office:value-type="string">
            <text:p>convert_quantity</text:p>
          </table:table-cell>
          <table:table-cell office:value-type="string">
            <text:p>Convert 10 m/s → km/h (single formatted cell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value":"10","from_unit":"m/s","to_unit":"km/h"}</text:p>
          </table:table-cell>
          <table:table-cell office:value-type="string">
            <text:p>36 km/h</text:p>
          </table:table-cell>
          <table:table-cell office:value-type="formula" table:formula="of:=PYTHON(&quot;from writeragent.scripting.units import run_units; run_units({&quot;&quot;helper&quot;&quot;:&quot;&quot;convert_quantity&quot;&quot;,&quot;&quot;params&quot;&quot;:{&quot;&quot;value&quot;&quot;:&quot;&quot;10&quot;&quot;,&quot;&quot;from_unit&quot;&quot;:&quot;&quot;m/s&quot;&quot;,&quot;&quot;to_unit&quot;&quot;:&quot;&quot;km/h&quot;&quot;}}, None, {})[&quot;&quot;formatted&quot;&quot;]&quot;)"/>
          <table:table-cell office:value-type="string">
            <text:p>Units Helpers → [Units] convert_quantity</text:p>
          </table:table-cell>
          <table:table-cell/>
          <table:table-cell office:value-type="string">
            <text:p>requires: pint; check_mode: formatted_cell</text:p>
          </table:table-cell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arse_quantity</text:p>
          </table:table-cell>
          <table:table-cell office:value-type="string">
            <text:p>units</text:p>
          </table:table-cell>
          <table:table-cell office:value-type="string">
            <text:p>parse_quantity</text:p>
          </table:table-cell>
          <table:table-cell office:value-type="string">
            <text:p>Parse quantity string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quantity":"5 km/h"}</text:p>
          </table:table-cell>
          <table:table-cell office:value-type="string">
            <text:p>5</text:p>
          </table:table-cell>
          <table:table-cell office:value-type="formula" table:formula="of:=PYTHON(&quot;from writeragent.scripting.units import run_units; run_units({&quot;&quot;helper&quot;&quot;:&quot;&quot;parse_quantity&quot;&quot;,&quot;&quot;params&quot;&quot;:{&quot;&quot;quantity&quot;&quot;:&quot;&quot;5 km/h&quot;&quot;}}, None, {})[&quot;&quot;magnitude&quot;&quot;]&quot;)"/>
          <table:table-cell office:value-type="string">
            <text:p>Units Helpers → [Units] parse_quantity</text:p>
          </table:table-cell>
          <table:table-cell/>
          <table:table-cell office:value-type="string">
            <text:p>requires: pint; check_mode: formatted_cell</text:p>
          </table:table-cell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ormat_quantity</text:p>
          </table:table-cell>
          <table:table-cell office:value-type="string">
            <text:p>units</text:p>
          </table:table-cell>
          <table:table-cell office:value-type="string">
            <text:p>format_quantity</text:p>
          </table:table-cell>
          <table:table-cell office:value-type="string">
            <text:p>Format magnitude + units (no shipped RPS template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magnitude":"3.5","units":"m"}</text:p>
          </table:table-cell>
          <table:table-cell office:value-type="string">
            <text:p>contains 3.5</text:p>
          </table:table-cell>
          <table:table-cell office:value-type="formula" table:formula="of:=PYTHON(&quot;from writeragent.scripting.units import run_units; run_units({&quot;&quot;helper&quot;&quot;:&quot;&quot;format_quantity&quot;&quot;,&quot;&quot;params&quot;&quot;:{&quot;&quot;magnitude&quot;&quot;:&quot;&quot;3.5&quot;&quot;,&quot;&quot;units&quot;&quot;:&quot;&quot;m&quot;&quot;}}, None, {})[&quot;&quot;formatted&quot;&quot;]&quot;)"/>
          <table:table-cell office:value-type="string">
            <text:p>Units Helpers (custom) — # writeragent:units helper=format_quantity</text:p>
          </table:table-cell>
          <table:table-cell/>
          <table:table-cell office:value-type="string">
            <text:p>Header: # writeragent:units helper=format_quantity params={"magnitude":"3.5","units":"m"}; requires: pint; check_mode: formatted_cell</text:p>
          </table:table-cell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heck_dimensionality</text:p>
          </table:table-cell>
          <table:table-cell office:value-type="string">
            <text:p>units</text:p>
          </table:table-cell>
          <table:table-cell office:value-type="string">
            <text:p>check_dimensionality</text:p>
          </table:table-cell>
          <table:table-cell office:value-type="string">
            <text:p>Dimensional compatibility check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quantity_a":"10 m/s","quantity_b":"5 km/h","output_style":"detailed"}</text:p>
          </table:table-cell>
          <table:table-cell office:value-type="string">
            <text:p>True</text:p>
          </table:table-cell>
          <table:table-cell office:value-type="formula" table:formula="of:=PYTHON(&quot;from writeragent.scripting.units import run_units; run_units({&quot;&quot;helper&quot;&quot;:&quot;&quot;check_dimensionality&quot;&quot;,&quot;&quot;params&quot;&quot;:{&quot;&quot;quantity_a&quot;&quot;:&quot;&quot;10 m/s&quot;&quot;,&quot;&quot;quantity_b&quot;&quot;:&quot;&quot;5 km/h&quot;&quot;}}, None, {})[&quot;&quot;compatible&quot;&quot;]&quot;)"/>
          <table:table-cell office:value-type="string">
            <text:p>Units Helpers → [Units] check_dimensionality</text:p>
          </table:table-cell>
          <table:table-cell/>
          <table:table-cell office:value-type="string">
            <text:p>Use output_style:"detailed" in params for full key-value grid; requires: pint; check_mode: grid_egress</text:p>
          </table:table-cell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oal_seek_solver">
        <table:table-row>
          <table:table-cell office:value-type="float" office:value="1.0"/>
          <table:table-cell office:value-type="formula" table:formula="of:=A1^2"/>
          <table:table-cell/>
          <table:table-cell/>
          <table:table-cell/>
          <table:table-cell office:value-type="string">
            <text:p>B1 (=A1^2)</text:p>
          </table:table-cell>
          <table:table-cell/>
          <table:table-cell office:value-type="string">
            <text:p>Goal Seek: A1=variable, B1=A1^2 → target 100 → |x|≈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1.0"/>
          <table:table-cell office:value-type="float" office:value="1.0"/>
          <table:table-cell office:value-type="formula" table:formula="of:=3*A3+5*B3"/>
          <table:table-cell office:value-type="formula" table:formula="of:=A3+B3"/>
          <table:table-cell/>
          <table:table-cell office:value-type="string">
            <text:p>D3 constraint</text:p>
          </table:table-cell>
          <table:table-cell/>
          <table:table-cell office:value-type="string">
            <text:p>Solver: max 3x+5y s.t. x+y&lt;=10 (see A3:D3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lock_id</text:p>
          </table:table-cell>
          <table:table-cell office:value-type="string">
            <text:p>description</text:p>
          </table:table-cell>
          <table:table-cell office:value-type="string">
            <text:p>expected</text:p>
          </table:table-cell>
          <table:table-cell office:value-type="string">
            <text:p>chat_prompt</text:p>
          </table:table-cell>
          <table:table-cell office:value-type="string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oal_seek_square</text:p>
          </table:table-cell>
          <table:table-cell office:value-type="string">
            <text:p>Find x such that x^2 = 100</text:p>
          </table:table-cell>
          <table:table-cell office:value-type="string">
            <text:p>|x| ≈ 10</text:p>
          </table:table-cell>
          <table:table-cell office:value-type="string">
            <text:p>calc_goal_seek formula_cell=goal_seek_solver.B1 variable_cell=goal_seek_solver.A1 target_value=100 apply_result=true</text:p>
          </table:table-cell>
          <table:table-cell office:value-type="string">
            <text:p>Use WriterAgent chat with domain=analysis or MCP calc_goal_seek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olver_lp</text:p>
          </table:table-cell>
          <table:table-cell office:value-type="string">
            <text:p>Maximize 3x+5y subject to x+y&lt;=10, x,y&gt;=0</text:p>
          </table:table-cell>
          <table:table-cell office:value-type="string">
            <text:p>objective=50, y=10, x=0</text:p>
          </table:table-cell>
          <table:table-cell office:value-type="string">
            <text:p>calc_solver objective_cell=goal_seek_solver.C3 variables=[goal_seek_solver.A3,goal_seek_solver.B3] maximize=true engine=com.sun.star.sheet.SolverLinear constraints=[{"left":"goal_seek_solver.D3","operator":"LESS_EQUAL","right":"10.0"},{"left":"goal_seek_solver.A3","operator":"GREATER_EQUAL","right":"0.0"},{"left":"goal_seek_solver.B3","operator":"GREATER_EQUAL","right":"0.0"}]</text:p>
          </table:table-cell>
          <table:table-cell office:value-type="string">
            <text:p>Requires Calc Solver engine; skip if unavailabl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of="urn:oasis:names:tc:opendocument:xmlns:of:1.2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of="urn:oasis:names:tc:opendocument:xmlns:of:1.2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